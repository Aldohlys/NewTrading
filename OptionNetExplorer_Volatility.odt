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E000000E7952462C031866E4E.png" manifest:media-type="image/png"/>
  <manifest:file-entry manifest:full-path="Pictures/100000010000015B000000D7146F77B528CC138F.png" manifest:media-type="image/png"/>
  <manifest:file-entry manifest:full-path="Pictures/10000001000001600000006C2A5E0BE86F4CD8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10.109cm" svg:height="6.112cm" draw:z-index="1"><draw:image xlink:href="Pictures/100000010000017E000000E7952462C031866E4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x="3.729cm" svg:y="3.554cm" svg:width="9.183cm" svg:height="5.689cm" draw:z-index="0"><draw:image xlink:href="Pictures/100000010000015B000000D7146F77B528CC138F.png" xlink:type="simple" xlink:show="embed" xlink:actuate="onLoad" draw:mime-type="image/png"/></draw:frame><draw:frame draw:style-name="fr1" draw:name="Image3" text:anchor-type="char" svg:width="9.313cm" svg:height="2.858cm" draw:z-index="2"><draw:image xlink:href="Pictures/10000001000001600000006C2A5E0BE86F4CD8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20:02:09.871000000</meta:creation-date>
    <dc:date>2024-11-07T09:17:31.538000000</dc:date>
    <meta:editing-duration>PT13H15M2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5.7.1$Windows_X86_64 LibreOffice_project/47eb0cf7efbacdee9b19ae25d6752381ede23126</meta:generator>
  </office:meta>
</office:document-meta>
</file>
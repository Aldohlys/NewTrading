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11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3"/>
          <table:table-cell office:value-type="float" office:value="5475" calcext:value-type="float">
            <text:p>5475</text:p>
          </table:table-cell>
          <table:table-cell table:formula="of:=LN([.D7]/[.D8])/28*365" office:value-type="float" office:value="0.0214462032782562" calcext:value-type="float">
            <text:p>0.021446203278256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466" calcext:value-type="float">
            <text:p>5466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3" office:value-type="string" calcext:value-type="string">
            <text:p>Implied IR</text:p>
          </table:table-cell>
          <table:table-cell table:number-columns-repeated="5"/>
          <table:table-cell table:style-name="ce3" office:value-type="string" calcext:value-type="string">
            <text:p>Implied IR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SLA</text:p>
          </table:table-cell>
          <table:table-cell office:value-type="float" office:value="415.25" calcext:value-type="float">
            <text:p>415.25</text:p>
          </table:table-cell>
          <table:table-cell/>
          <table:table-cell table:formula="of:=LN([.E12]/[.E15])" office:value-type="float" office:value="0.0116148105693745" calcext:value-type="float">
            <text:p>0.0116148105693745</text:p>
          </table:table-cell>
          <table:table-cell table:number-columns-repeated="2"/>
          <table:table-cell table:style-name="ce3" office:value-type="string" calcext:value-type="string">
            <text:p>ESTX50</text:p>
          </table:table-cell>
          <table:table-cell office:value-type="float" office:value="5444" calcext:value-type="float">
            <text:p>5444</text:p>
          </table:table-cell>
          <table:table-cell/>
          <table:table-cell table:formula="of:=LN([.K12]/[.K15])" office:value-type="float" office:value="-0.00782118647848522" calcext:value-type="float">
            <text:p>-0.007821186478485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T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table:formula="of:=[.G10]*365/[.E11]" office:value-type="percentage" office:value="0.0465868775584801" calcext:value-type="percentage">
            <text:p>4.66%</text:p>
          </table:table-cell>
          <table:table-cell table:number-columns-repeated="2"/>
          <table:table-cell office:value-type="string" calcext:value-type="string">
            <text:p>DTE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2" table:formula="of:=[.M10]*365/[.K11]" office:value-type="percentage" office:value="-0.035243618082063" calcext:value-type="percentage">
            <text:p>-3.52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ike</text:p>
          </table:table-cell>
          <table:table-cell office:value-type="float" office:value="420" calcext:value-type="float">
            <text:p>420</text:p>
          </table:table-cell>
          <table:table-cell table:number-columns-repeated="4"/>
          <table:table-cell office:value-type="string" calcext:value-type="string">
            <text:p>Strike</text:p>
          </table:table-cell>
          <table:table-cell office:value-type="float" office:value="5400" calcext:value-type="float">
            <text:p>54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ll</text:p>
          </table:table-cell>
          <table:table-cell office:value-type="float" office:value="50.6" calcext:value-type="float">
            <text:p>50.6</text:p>
          </table:table-cell>
          <table:table-cell table:number-columns-repeated="4"/>
          <table:table-cell office:value-type="string" calcext:value-type="string">
            <text:p>Call</text:p>
          </table:table-cell>
          <table:table-cell office:value-type="float" office:value="147.6" calcext:value-type="float">
            <text:p>14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ut</text:p>
          </table:table-cell>
          <table:table-cell office:value-type="float" office:value="50.5" calcext:value-type="float">
            <text:p>50.5</text:p>
          </table:table-cell>
          <table:table-cell table:number-columns-repeated="4"/>
          <table:table-cell office:value-type="string" calcext:value-type="string">
            <text:p>Put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-C+P</text:p>
          </table:table-cell>
          <table:table-cell table:formula="of:=[.E10]-[.E13]+[.E14]" office:value-type="float" office:value="415.15" calcext:value-type="float">
            <text:p>415.15</text:p>
          </table:table-cell>
          <table:table-cell table:number-columns-repeated="4"/>
          <table:table-cell office:value-type="string" calcext:value-type="string">
            <text:p>S-C+P</text:p>
          </table:table-cell>
          <table:table-cell table:formula="of:=[.K10]-[.K13]+[.K14]" office:value-type="float" office:value="5442.4" calcext:value-type="float">
            <text:p>5442.4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yn fut</text:p>
          </table:table-cell>
          <table:table-cell table:formula="of:=[.E12]+[.E13]-[.E14]" office:value-type="float" office:value="420.1" calcext:value-type="float">
            <text:p>420.1</text:p>
          </table:table-cell>
          <table:table-cell table:number-columns-repeated="4"/>
          <table:table-cell office:value-type="string" calcext:value-type="string">
            <text:p>Syn fut</text:p>
          </table:table-cell>
          <table:table-cell table:formula="of:=[.K12]+[.K13]-[.K14]" office:value-type="float" office:value="5401.6" calcext:value-type="float">
            <text:p>5401.6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onversion trade</text:p>
          </table:table-cell>
          <table:table-cell office:value-type="string" calcext:value-type="string">
            <text:p>Short 420 Call, long 420 Put, long stock</text:p>
          </table:table-cell>
          <table:table-cell table:number-columns-repeated="8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UVIX</text:p>
          </table:table-cell>
          <table:table-cell table:number-columns-repeated="2"/>
          <table:table-cell office:value-type="string" calcext:value-type="string">
            <text:p>Vol</text:p>
          </table:table-cell>
          <table:table-cell table:number-columns-repeated="3"/>
          <table:table-cell office:value-type="string" calcext:value-type="string">
            <text:p>ASH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raddle price</text:p>
          </table:table-cell>
          <table:table-cell office:value-type="float" office:value="4.2" calcext:value-type="float">
            <text:p>4.2</text:p>
          </table:table-cell>
          <table:table-cell table:formula="of:=[.C24]/[.C25]" office:value-type="float" office:value="0.15712682379349" calcext:value-type="float">
            <text:p>0.15712682379349</text:p>
          </table:table-cell>
          <table:table-cell table:style-name="ce2" table:formula="of:=1.25*SQRT(252/[.C26])*[.D24]" office:value-type="percentage" office:value="0.833290819580106" calcext:value-type="percentage">
            <text:p>83.33%</text:p>
          </table:table-cell>
          <table:table-cell table:number-columns-repeated="3"/>
          <table:table-cell office:value-type="string" calcext:value-type="string">
            <text:p>Straddle price</text:p>
          </table:table-cell>
          <table:table-cell office:value-type="float" office:value="1.31" calcext:value-type="float">
            <text:p>1.31</text:p>
          </table:table-cell>
          <table:table-cell table:formula="of:=[.J24]/[.J25]" office:value-type="float" office:value="0.0476883873316345" calcext:value-type="float">
            <text:p>0.0476883873316345</text:p>
          </table:table-cell>
          <table:table-cell table:style-name="ce2" table:formula="of:=1.25*SQRT(252/[.J26])*[.K24]" office:value-type="percentage" office:value="0.252905865495371" calcext:value-type="percentage">
            <text:p>25.29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t price</text:p>
          </table:table-cell>
          <table:table-cell office:value-type="float" office:value="26.73" calcext:value-type="float">
            <text:p>26.73</text:p>
          </table:table-cell>
          <table:table-cell table:number-columns-repeated="5"/>
          <table:table-cell office:value-type="string" calcext:value-type="string">
            <text:p>Spot price</text:p>
          </table:table-cell>
          <table:table-cell office:value-type="float" office:value="27.47" calcext:value-type="float">
            <text:p>27.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E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DT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0.021" calcext:value-type="float">
            <text:p>0.021</text:p>
          </table:table-cell>
          <table:table-cell table:formula="of:=[.L27]*300" office:value-type="float" office:value="6.3" calcext:value-type="float">
            <text:p>6.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</text:p>
          </table:table-cell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rike</text:p>
          </table:table-cell>
          <table:table-cell office:value-type="float" office:value="200" calcext:value-type="float">
            <text:p>200</text:p>
          </table:table-cell>
          <table:table-cell table:style-name="ce2" table:formula="of:=1-[.E29]/[.E28]" office:value-type="percentage" office:value="0.134199134199134" calcext:value-type="percentage">
            <text:p>13.42%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ut</text:p>
          </table:table-cell>
          <table:table-cell office:value-type="float" office:value="2.3" calcext:value-type="float">
            <text:p>2.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TE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3" office:value-type="string" calcext:value-type="string">
            <text:p>Return</text:p>
          </table:table-cell>
          <table:table-cell table:style-name="ce2" table:formula="of:=[.E30]/[.E29]" office:value-type="percentage" office:value="0.0115" calcext:value-type="percentage">
            <text:p>1.15%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3" office:value-type="string" calcext:value-type="string">
            <text:p>Yield</text:p>
          </table:table-cell>
          <table:table-cell table:style-name="ce2" table:formula="of:=[.E32]*365/[.E31]" office:value-type="percentage" office:value="0.0823039215686275" calcext:value-type="percentage">
            <text:p>8.23%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HEDGES</text:p>
          </table:table-cell>
          <table:table-cell office:value-type="float" office:value="5160" calcext:value-type="float">
            <text:p>5160</text:p>
          </table:table-cell>
          <table:table-cell table:number-columns-repeated="3"/>
          <table:table-cell office:value-type="float" office:value="260000" calcext:value-type="float">
            <text:p>2600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0.38/18.4" office:value-type="float" office:value="0.0206521739130435" calcext:value-type="float">
            <text:p>0.02065217391304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awdown</text:p>
          </table:table-cell>
          <table:table-cell table:style-name="ce2" office:value-type="percentage" office:value="0.1" calcext:value-type="percentage">
            <text:p>10.00%</text:p>
          </table:table-cell>
          <table:table-cell table:formula="of:=[.C$36]*(1-[.C37])" office:value-type="float" office:value="4644" calcext:value-type="float">
            <text:p>4644</text:p>
          </table:table-cell>
          <table:table-cell table:number-columns-repeated="3"/>
          <table:table-cell table:formula="of:=[.G36]/[.H36]" office:value-type="float" office:value="433.333333333333" calcext:value-type="float">
            <text:p>433.3333333333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percentage" office:value="0.4" calcext:value-type="percentage">
            <text:p>40.00%</text:p>
          </table:table-cell>
          <table:table-cell table:formula="of:=[.C$36]*(1-[.C38])" office:value-type="float" office:value="3096" calcext:value-type="float">
            <text:p>309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09:41:56.841000000</meta:creation-date>
    <dc:date>2025-02-27T10:32:01.367000000</dc:date>
    <meta:editing-duration>P6DT50M5S</meta:editing-duration>
    <meta:editing-cycles>2</meta:editing-cycles>
    <meta:generator>LibreOffice/7.5.7.1$Windows_X86_64 LibreOffice_project/47eb0cf7efbacdee9b19ae25d6752381ede23126</meta:generator>
    <meta:document-statistic meta:table-count="1" meta:cell-count="84" meta:object-count="0"/>
  </office:meta>
</office:document-meta>
</file>
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E000003D4C20E68A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3cm" draw:z-index="0"><draw:image xlink:href="Pictures/10000001000003FE000003D4C20E68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21:46:40.212196000</meta:creation-date>
    <meta:editing-duration>PT6H1M3S</meta:editing-duration>
    <meta:editing-cycles>2</meta:editing-cycles>
    <meta:generator>LibreOffice/25.8.3.2$Windows_X86_64 LibreOffice_project/8ca8d55c161d602844f5428fa4b58097424e324e</meta:generator>
    <dc:date>2026-02-02T21:47:23.1668186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
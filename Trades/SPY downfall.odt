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9000002465BE854407423357D.png" manifest:media-type="image/png"/>
  <manifest:file-entry manifest:full-path="Pictures/10000001000002E600000191221A7FE78FADAF9C.png" manifest:media-type="image/png"/>
  <manifest:file-entry manifest:full-path="Pictures/100000010000043A0000014CF8AA72950F5F1BF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92cm" style:rel-column-width="15390*"/>
    </style:style>
    <style:style style:name="Tableau1.B" style:family="table-column">
      <style:table-column-properties style:column-width="2.79cm" style:rel-column-width="10756*"/>
    </style:style>
    <style:style style:name="Tableau1.C" style:family="table-column">
      <style:table-column-properties style:column-width="3.392cm" style:rel-column-width="13073*"/>
    </style:style>
    <style:style style:name="Tableau1.D" style:family="table-column">
      <style:table-column-properties style:column-width="3.415cm" style:rel-column-width="13161*"/>
    </style:style>
    <style:style style:name="Tableau1.E" style:family="table-column">
      <style:table-column-properties style:column-width="3.413cm" style:rel-column-width="1315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" officeooo:rsid="000acae6" officeooo:paragraph-rsid="000acae6"/>
    </style:style>
    <style:style style:name="P2" style:family="paragraph" style:parent-style-name="Table_20_Contents">
      <style:text-properties style:font-name="Calibri" officeooo:rsid="000acae6" officeooo:paragraph-rsid="000acae6"/>
    </style:style>
    <style:style style:name="P3" style:family="paragraph" style:parent-style-name="Standard">
      <style:text-properties style:font-name="Calibri" fo:font-size="16pt" fo:font-weight="bold" officeooo:rsid="000acae6" officeooo:paragraph-rsid="000acae6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libri" fo:font-size="16pt" fo:font-weight="bold" officeooo:rsid="000ce8fc" officeooo:paragraph-rsid="000ce8fc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alibri" fo:font-size="16pt" fo:font-weight="bold" officeooo:rsid="000ce8fc" officeooo:paragraph-rsid="001010d3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alibri" fo:font-size="16pt" fo:font-weight="bold" officeooo:rsid="000e1f6c" officeooo:paragraph-rsid="000e1f6c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Calibri" fo:font-size="16pt" fo:font-weight="normal" officeooo:rsid="000e1f6c" officeooo:paragraph-rsid="000e1f6c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Calibri" fo:font-size="16pt" style:text-underline-style="solid" style:text-underline-width="auto" style:text-underline-color="font-color" fo:font-weight="normal" officeooo:rsid="000e1f6c" officeooo:paragraph-rsid="000e1f6c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Calibri" officeooo:rsid="000c5725" officeooo:paragraph-rsid="000c5725"/>
    </style:style>
    <style:style style:name="P10" style:family="paragraph" style:parent-style-name="Table_20_Contents">
      <style:text-properties style:font-name="Calibri" fo:font-weight="bold" officeooo:rsid="000acae6" officeooo:paragraph-rsid="000acae6" style:font-weight-asian="bold" style:font-weight-complex="bold"/>
    </style:style>
    <style:style style:name="P11" style:family="paragraph" style:parent-style-name="Table_20_Contents">
      <style:text-properties style:font-name="Calibri"/>
    </style:style>
    <style:style style:name="P12" style:family="paragraph" style:parent-style-name="Standard">
      <style:text-properties style:font-name="Calibri" fo:font-size="14pt" style:text-underline-style="solid" style:text-underline-width="auto" style:text-underline-color="font-color" fo:font-weight="normal" officeooo:rsid="000ce8fc" officeooo:paragraph-rsid="000ce8f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Calibri" fo:font-size="18pt" fo:font-weight="bold" officeooo:rsid="000e1f6c" officeooo:paragraph-rsid="000e1f6c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Calibri" fo:font-size="14pt" fo:font-weight="normal" officeooo:rsid="001010d3" officeooo:paragraph-rsid="001010d3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alibri" fo:font-size="14pt" fo:font-weight="normal" officeooo:rsid="0010cb03" officeooo:paragraph-rsid="0010cb03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Calibri" fo:font-size="14pt" fo:font-weight="normal" officeooo:rsid="000e1f6c" officeooo:paragraph-rsid="000e1f6c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Calibri" fo:font-size="18pt" fo:font-weight="bold" officeooo:rsid="000e1f6c" officeooo:paragraph-rsid="000e1f6c" style:font-size-asian="18pt" style:font-weight-asian="bold" style:font-size-complex="18pt" style:font-weight-complex="bold"/>
    </style:style>
    <style:style style:name="P18" style:family="paragraph" style:parent-style-name="Standard">
      <style:text-properties style:font-name="Calibri" fo:font-size="18pt" fo:font-weight="bold" officeooo:rsid="0010cb03" officeooo:paragraph-rsid="0010cb03" style:font-size-asian="18pt" style:font-weight-asian="bold" style:font-size-complex="18pt" style:font-weight-complex="bold"/>
    </style:style>
    <style:style style:name="P19" style:family="paragraph" style:parent-style-name="Standard">
      <style:text-properties style:font-name="Calibri" fo:font-size="16pt" fo:font-weight="bold" officeooo:rsid="0010cb03" officeooo:paragraph-rsid="0010cb03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paragraph-rsid="001123eb"/>
    </style:style>
    <style:style style:name="T1" style:family="text">
      <style:text-properties officeooo:rsid="000acae6"/>
    </style:style>
    <style:style style:name="T2" style:family="text">
      <style:text-properties officeooo:rsid="001100eb"/>
    </style:style>
    <style:style style:name="T3" style:family="text">
      <style:text-properties officeooo:rsid="001123eb"/>
    </style:style>
    <style:style style:name="T4" style:family="text">
      <style:text-properties style:font-name="Calibri" fo:font-size="14pt" fo:font-weight="normal" officeooo:rsid="0010cb03" style:font-size-asian="14pt" style:font-weight-asian="normal" style:font-size-complex="14pt" style:font-weight-complex="normal"/>
    </style:style>
    <style:style style:name="T5" style:family="text">
      <style:text-properties style:font-name="Calibri" fo:font-size="14pt" fo:font-weight="normal" officeooo:rsid="001100eb" style:font-size-asian="14pt" style:font-weight-asian="normal" style:font-size-complex="14pt" style:font-weight-complex="normal"/>
    </style:style>
    <style:style style:name="T6" style:family="text">
      <style:text-properties style:font-name="Calibri" fo:font-size="14pt" fo:font-weight="normal" officeooo:rsid="001123eb" style:font-size-asian="14pt" style:font-weight-asian="normal" style:font-size-complex="14pt" style:font-weight-complex="normal"/>
    </style:style>
    <style:style style:name="T7" style:family="text">
      <style:text-properties officeooo:rsid="0012da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03-07-2024</text:p>
      <text:p text:style-name="P15">SPY=549</text:p>
      <text:p text:style-name="P15">SPX=5509</text:p>
      <text:p text:style-name="P15">VIX=12.13</text:p>
      <text:p text:style-name="P15"/>
      <text:p text:style-name="P20"><text:span text:style-name="T4">Estimated 80 % confidence move </text:span><text:span text:style-name="T5">with 8.95 % vol </text:span><text:span text:style-name="T6">(see </text:span><text:a xlink:type="simple" xlink:href="https://vlab.stern.nyu.edu/volatility/VOL.SPY%3AUS-R.GARCH" text:style-name="Internet_20_link" text:visited-style-name="Visited_20_Internet_20_Link">V-Lab: SPDR S&amp;P 500 ETF Trust GARCH Volatility Analysis (nyu.edu)</text:a> <text:span text:style-name="T3">)</text:span><text:span text:style-name="T4">: 54</text:span><text:span text:style-name="T5">5</text:span><text:span text:style-name="T4">-55</text:span><text:span text:style-name="T5">3</text:span></text:p>
      <text:p text:style-name="P15">Simulation with IV=<text:span text:style-name="T2">10</text:span> % for today</text:p>
      <text:p text:style-name="P19"/>
      <text:p text:style-name="P19"><draw:frame draw:style-name="fr1" draw:name="Image3" text:anchor-type="char" svg:width="17cm" svg:height="8.521cm" draw:z-index="2"><draw:image xlink:href="Pictures/1000000100000489000002465BE854407423357D.png" xlink:type="simple" xlink:show="embed" xlink:actuate="onLoad" draw:mime-type="image/png"/></draw:frame></text:p>
      <text:p text:style-name="P19">→ <text:span text:style-name="T7">Get out of this trade</text:span></text:p>
      <text:p text:style-name="P19"/>
      <text:p text:style-name="P13"/>
      <text:p text:style-name="Horizontal_20_Line"/>
      <text:p text:style-name="P13"/>
      <text:p text:style-name="P13">21-06-2024</text:p>
      <text:p text:style-name="P16">SPY=547</text:p>
      <text:p text:style-name="P16">SPX=5473</text:p>
      <text:p text:style-name="P16">VIX=13.49</text:p>
      <text:p text:style-name="P6"/>
      <text:p text:style-name="P6">Instruments :</text:p>
      <text:p text:style-name="P7">Combo SPX = Bull Call Spread + Short Put </text:p>
      <text:p text:style-name="P4"><draw:frame draw:style-name="fr3" draw:name="Image2" text:anchor-type="char" svg:x="0.191cm" svg:y="0.019cm" svg:width="11.859cm" svg:height="6.41cm" draw:z-index="1"><draw:image xlink:href="Pictures/10000001000002E600000191221A7FE78FADAF9C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8"/>
      <text:p text:style-name="P4"/>
      <text:p text:style-name="P4"/>
      <text:p text:style-name="P4"/>
      <text:p text:style-name="P4"/>
      <text:p text:style-name="P4"/>
      <text:p text:style-name="P14">Too much volatility → sold it</text:p>
      <text:p text:style-name="P5">-----------</text:p>
      <text:p text:style-name="P4"/>
      <text:p text:style-name="P4">SPY</text:p>
      <text:p text:style-name="P4">07-06-2024</text:p>
      <text:p text:style-name="P4">SPY= 535.57</text:p>
      <text:p text:style-name="P3"/>
      <text:p text:style-name="P12">Sc. 1 : unchanged vol, unchanged price</text:p>
      <text:p text:style-name="P3"><draw:frame draw:style-name="fr2" draw:name="Image1" text:anchor-type="char" svg:width="17cm" svg:height="5.214cm" draw:z-index="0"><draw:image xlink:href="Pictures/100000010000043A0000014CF8AA72950F5F1BFA.png" xlink:type="simple" xlink:show="embed" xlink:actuate="onLoad" draw:mime-type="image/png"/></draw:frame></text:p>
      <text:p text:style-name="P3"/>
      <text:p text:style-name="P3">SPY</text:p>
      <text:p text:style-name="P3">8-10-2023 </text:p>
      <text:p text:style-name="P3">- SPY=430</text:p>
      <text:p text:style-name="P1"/>
      <text:p text:style-name="P1">---</text:p>
      <text:p text:style-name="P1"/>
      <text:p text:style-name="P1">Stratégie :</text:p>
      <text:p text:style-name="P1">Rebond probable du SPY pour une rechute ensuite</text:p>
      <text:p text:style-name="P1"/>
      <text:p text:style-name="P1">Position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0">Position</text:p>
          </table:table-cell>
          <table:table-cell table:style-name="Tableau1.A1" office:value-type="string">
            <text:p text:style-name="P10">Delta : 18</text:p>
          </table:table-cell>
          <table:table-cell table:style-name="Tableau1.A1" office:value-type="string">
            <text:p text:style-name="P10">Theta : -3</text:p>
          </table:table-cell>
          <table:table-cell table:style-name="Tableau1.A1" office:value-type="string">
            <text:p text:style-name="P10">Vega : 2</text:p>
          </table:table-cell>
          <table:table-cell table:style-name="Tableau1.E1" office:value-type="string">
            <text:p text:style-name="P10">Gamma:0.003</text:p>
          </table:table-cell>
        </table:table-row>
        <table:table-row>
          <table:table-cell table:style-name="Tableau1.A2" office:value-type="string">
            <text:p text:style-name="P2">+1 Call 430, 20-Oct</text:p>
          </table:table-cell>
          <table:table-cell table:style-name="Tableau1.A2" office:value-type="string">
            <text:p text:style-name="P2">54</text:p>
          </table:table-cell>
          <table:table-cell table:style-name="Tableau1.A2" office:value-type="string">
            <text:p text:style-name="P11">-<text:span text:style-name="T1">23</text:span></text:p>
          </table:table-cell>
          <table:table-cell table:style-name="Tableau1.A2" office:value-type="string">
            <text:p text:style-name="P2">30</text:p>
          </table:table-cell>
          <table:table-cell table:style-name="Tableau1.E2" office:value-type="string">
            <text:p text:style-name="P2">3.346</text:p>
          </table:table-cell>
        </table:table-row>
        <text:soft-page-break/>
        <table:table-row>
          <table:table-cell table:style-name="Tableau1.A2" office:value-type="string">
            <text:p text:style-name="P11">-<text:span text:style-name="T1">1 Call 435, 20-Oct</text:span></text:p>
          </table:table-cell>
          <table:table-cell table:style-name="Tableau1.A2" office:value-type="string">
            <text:p text:style-name="P11">-<text:span text:style-name="T1">36</text:span></text:p>
          </table:table-cell>
          <table:table-cell table:style-name="Tableau1.A2" office:value-type="string">
            <text:p text:style-name="P2">+20</text:p>
          </table:table-cell>
          <table:table-cell table:style-name="Tableau1.A2" office:value-type="string">
            <text:p text:style-name="P11">-<text:span text:style-name="T1">28</text:span></text:p>
          </table:table-cell>
          <table:table-cell table:style-name="Tableau1.E2" office:value-type="string">
            <text:p text:style-name="P11">-<text:span text:style-name="T1">3.343</text:span></text:p>
          </table:table-cell>
        </table:table-row>
        <table:table-row>
          <table:table-cell table:style-name="Tableau1.A2" office:value-type="string">
            <text:p text:style-name="P10">Position</text:p>
          </table:table-cell>
          <table:table-cell table:style-name="Tableau1.A2" office:value-type="string">
            <text:p text:style-name="P10">Delta : -19</text:p>
          </table:table-cell>
          <table:table-cell table:style-name="Tableau1.A2" office:value-type="string">
            <text:p text:style-name="P10">Theta : -7</text:p>
          </table:table-cell>
          <table:table-cell table:style-name="Tableau1.A2" office:value-type="string">
            <text:p text:style-name="P10">Vega : +20</text:p>
          </table:table-cell>
          <table:table-cell table:style-name="Tableau1.E2" office:value-type="string">
            <text:p text:style-name="P10">Gamma : 1.4</text:p>
          </table:table-cell>
        </table:table-row>
        <table:table-row>
          <table:table-cell table:style-name="Tableau1.A2" office:value-type="string">
            <text:p text:style-name="P2">+1 Put 420, 27-Oct</text:p>
          </table:table-cell>
          <table:table-cell table:style-name="Tableau1.A2" office:value-type="string">
            <text:p text:style-name="P11">-<text:span text:style-name="T1">24</text:span></text:p>
          </table:table-cell>
          <table:table-cell table:style-name="Tableau1.A2" office:value-type="string">
            <text:p text:style-name="P11">-<text:span text:style-name="T1">12</text:span></text:p>
          </table:table-cell>
          <table:table-cell table:style-name="Tableau1.A2" office:value-type="string">
            <text:p text:style-name="P2">31</text:p>
          </table:table-cell>
          <table:table-cell table:style-name="Tableau1.E2" office:value-type="string">
            <text:p text:style-name="P2">1.9</text:p>
          </table:table-cell>
        </table:table-row>
        <table:table-row>
          <table:table-cell table:style-name="Tableau1.A2" office:value-type="string">
            <text:p text:style-name="P11">-<text:span text:style-name="T1">1 Put 400, 27-Oct</text:span></text:p>
          </table:table-cell>
          <table:table-cell table:style-name="Tableau1.A2" office:value-type="string">
            <text:p text:style-name="P2">5</text:p>
          </table:table-cell>
          <table:table-cell table:style-name="Tableau1.A2" office:value-type="string">
            <text:p text:style-name="P2">5</text:p>
          </table:table-cell>
          <table:table-cell table:style-name="Tableau1.A2" office:value-type="string">
            <text:p text:style-name="P11">-<text:span text:style-name="T1">11</text:span></text:p>
          </table:table-cell>
          <table:table-cell table:style-name="Tableau1.E2" office:value-type="string">
            <text:p text:style-name="P11">-<text:span text:style-name="T1">0.5</text:span></text:p>
          </table:table-cell>
        </table:table-row>
      </table:table>
      <text:p text:style-name="P1"/>
      <text:p text:style-name="P9">Conclusion :</text:p>
      <text:p text:style-name="P9">If SPY continues to go up, buy back the Put 400</text:p>
      <text:p text:style-name="P9">If SPY goes down, check if Call 435 worth selling</text:p>
      <text:p text:style-name="P9">If SPY goes sideways – no action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21:10:34.553000000</meta:creation-date>
    <dc:date>2024-07-04T18:43:03.389000000</dc:date>
    <meta:editing-duration>P5DT15H24M11S</meta:editing-duration>
    <meta:editing-cycles>9</meta:editing-cycles>
    <meta:generator>LibreOffice/7.5.7.1$Windows_X86_64 LibreOffice_project/47eb0cf7efbacdee9b19ae25d6752381ede23126</meta:generator>
    <meta:document-statistic meta:table-count="1" meta:image-count="3" meta:object-count="0" meta:page-count="3" meta:paragraph-count="60" meta:word-count="173" meta:character-count="860" meta:non-whitespace-character-count="744"/>
  </office:meta>
</office:document-meta>
</file>
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98000002809CA436368252376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1337" officeooo:paragraph-rsid="00181337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81337" officeooo:paragraph-rsid="00181337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19eed9" officeooo:paragraph-rsid="0019eed9"/>
    </style:style>
    <style:style style:name="T1" style:family="text">
      <style:text-properties officeooo:rsid="0019ee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X 14-18 DTE Calendar trades</text:p>
      <text:p text:style-name="P1"/>
      <text:p text:style-name="P1"/>
      <text:p text:style-name="P1">04-07-2024</text:p>
      <text:p text:style-name="P1"><text:span text:style-name="T1">Day is </text:span>Closed</text:p>
      <text:p text:style-name="P3">Executed a 5520 Calendar as SPX was at 5517. This is what it should look like on Jul 8. Should therefore be closed automatically if right.</text:p>
      <text:p text:style-name="P1"/>
      <text:p text:style-name="P1"><draw:frame draw:style-name="fr1" draw:name="Image1" text:anchor-type="char" svg:width="17cm" svg:height="9.252cm" draw:z-index="0"><draw:image xlink:href="Pictures/1000000100000498000002809CA43636825237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4T18:43:07.092000000</meta:creation-date>
    <dc:date>2024-07-04T19:31:52.701000000</dc:date>
    <meta:editing-duration>PT48M45S</meta:editing-duration>
    <meta:editing-cycles>2</meta:editing-cycles>
    <meta:generator>LibreOffice/7.5.7.1$Windows_X86_64 LibreOffice_project/47eb0cf7efbacdee9b19ae25d6752381ede23126</meta:generator>
    <meta:document-statistic meta:table-count="0" meta:image-count="1" meta:object-count="0" meta:page-count="1" meta:paragraph-count="4" meta:word-count="35" meta:character-count="190" meta:non-whitespace-character-count="159"/>
  </office:meta>
</office:document-meta>
</file>
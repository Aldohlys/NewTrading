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180000042F4DD68CB287B406CE.png" manifest:media-type="image/png"/>
  <manifest:file-entry manifest:full-path="Pictures/100000010000014E000002A22B630821BBCD71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796" officeooo:paragraph-rsid="000337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X50 end of year Study</text:p>
      <text:p text:style-name="P1"/>
      <text:p text:style-name="P1">Looking for Dec/Jan disparity, i.e. buy Jan 2026, sell Dec 2025 :</text:p>
      <text:p text:style-name="P1"/>
      <text:p text:style-name="P1"><draw:frame draw:style-name="fr2" draw:name="Image1" text:anchor-type="paragraph" svg:x="0.019cm" svg:y="0.661cm" svg:width="17cm" svg:height="10.024cm" draw:z-index="0"><draw:image xlink:href="Pictures/10000001000007180000042F4DD68CB287B406CE.png" xlink:type="simple" xlink:show="embed" xlink:actuate="onLoad" draw:mime-type="image/png"/></draw:frame>As of 13.06.2025 :</text:p>
      <text:p text:style-name="P1"/>
      <text:p text:style-name="P1">Notice that one month ago it was steeper and it was flat on Jan 13th. (6 months ago) :</text:p>
      <text:p text:style-name="P1"><draw:frame draw:style-name="fr1" draw:name="Image2" text:anchor-type="char" svg:x="5.72cm" svg:y="1.132cm" svg:width="3.898cm" svg:height="7.863cm" draw:z-index="1"><draw:image xlink:href="Pictures/100000010000014E000002A22B630821BBCD71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01:05:34.304000000</meta:creation-date>
    <dc:date>2025-06-13T01:17:11.379000000</dc:date>
    <meta:editing-duration>PT11M38S</meta:editing-duration>
    <meta:editing-cycles>1</meta:editing-cycles>
    <meta:document-statistic meta:table-count="0" meta:image-count="2" meta:object-count="0" meta:page-count="1" meta:paragraph-count="4" meta:word-count="40" meta:character-count="193" meta:non-whitespace-character-count="157"/>
    <meta:generator>LibreOffice/7.5.7.1$Windows_X86_64 LibreOffice_project/47eb0cf7efbacdee9b19ae25d6752381ede23126</meta:generator>
  </office:meta>
</office:document-meta>
</file>
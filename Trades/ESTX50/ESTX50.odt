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6F000002823589FBA90004BEE4.png" manifest:media-type="image/png"/>
  <manifest:file-entry manifest:full-path="Pictures/1000000100000475000001D7FC80541E4FB74B9F.png" manifest:media-type="image/png"/>
  <manifest:file-entry manifest:full-path="Pictures/10000001000004A40000032F85B1F7F2CD2B28B4.png" manifest:media-type="image/png"/>
  <manifest:file-entry manifest:full-path="Pictures/100000010000013C0000015A6548A72C0AB32ADC.png" manifest:media-type="image/png"/>
  <manifest:file-entry manifest:full-path="Pictures/10000001000004A6000000881E79E6D1B5636960.png" manifest:media-type="image/png"/>
  <manifest:file-entry manifest:full-path="Pictures/10000001000004B2000002FA335EB8EA285D7A99.png" manifest:media-type="image/png"/>
  <manifest:file-entry manifest:full-path="Pictures/1000000000000127000000BC26F4B25161A06329.png" manifest:media-type="image/png"/>
  <manifest:file-entry manifest:full-path="Pictures/10000001000004A3000000871C9B575D223A424E.png" manifest:media-type="image/png"/>
  <manifest:file-entry manifest:full-path="Pictures/10000001000006BE00000150CCE414F88F7D845C.png" manifest:media-type="image/png"/>
  <manifest:file-entry manifest:full-path="Pictures/100000000000024D000000DEE4E791C4CD61106F.png" manifest:media-type="image/png"/>
  <manifest:file-entry manifest:full-path="Pictures/10000001000006F5000002C498F5F92BDEE20BCC.png" manifest:media-type="image/png"/>
  <manifest:file-entry manifest:full-path="Pictures/10000001000004AA000000846A82B7164E0D12A5.png" manifest:media-type="image/png"/>
  <manifest:file-entry manifest:full-path="Pictures/10000001000004A50000008760B8061DB2819EF5.png" manifest:media-type="image/png"/>
  <manifest:file-entry manifest:full-path="Pictures/10000001000002D700000277E8CE9FD21803C558.png" manifest:media-type="image/png"/>
  <manifest:file-entry manifest:full-path="Pictures/10000001000004B60000020D2F7CC60D44BBD4DC.png" manifest:media-type="image/png"/>
  <manifest:file-entry manifest:full-path="Pictures/1000000100000703000002D0D7A2C212E113D491.png" manifest:media-type="image/png"/>
  <manifest:file-entry manifest:full-path="Pictures/10000001000003240000019B944505C875610312.png" manifest:media-type="image/png"/>
  <manifest:file-entry manifest:full-path="Pictures/10000001000004E8000004376FA866E1094F909F.png" manifest:media-type="image/png"/>
  <manifest:file-entry manifest:full-path="Pictures/10000001000003DD0000025B9A40B5E12866422C.png" manifest:media-type="image/png"/>
  <manifest:file-entry manifest:full-path="Pictures/1000000100000643000002A5B24C059CF599405A.png" manifest:media-type="image/png"/>
  <manifest:file-entry manifest:full-path="Pictures/10000001000003E6000001BD755E259D5CE658B0.png" manifest:media-type="image/png"/>
  <manifest:file-entry manifest:full-path="Pictures/10000001000003E4000001D18F02D89D5C4220ED.png" manifest:media-type="image/png"/>
  <manifest:file-entry manifest:full-path="Pictures/10000001000006FB000002D44FECD0786FA114D5.png" manifest:media-type="image/png"/>
  <manifest:file-entry manifest:full-path="Pictures/100000010000070F000002D888AA3C6958AAA796.png" manifest:media-type="image/png"/>
  <manifest:file-entry manifest:full-path="Pictures/1000000100000700000002BA86957A43ED6E98E5.png" manifest:media-type="image/png"/>
  <manifest:file-entry manifest:full-path="Pictures/1000000100000701000002CB628B360F4C2F39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24.684cm" fo:margin-left="0.009cm" fo:margin-top="0cm" fo:margin-bottom="0cm" table:align="left" style:writing-mode="lr-tb"/>
    </style:style>
    <style:style style:name="Tableau1.A" style:family="table-column">
      <style:table-column-properties style:column-width="2.154cm"/>
    </style:style>
    <style:style style:name="Tableau1.B" style:family="table-column">
      <style:table-column-properties style:column-width="5.678cm"/>
    </style:style>
    <style:style style:name="Tableau1.C" style:family="table-column">
      <style:table-column-properties style:column-width="16.852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CH" style:letter-kerning="true" style:font-name-asian="Calibri1" style:font-size-asian="11pt" style:language-asian="en" style:country-asian="US" style:font-size-complex="11pt" style:language-complex="ar" style:country-complex="SA"/>
    </style:style>
    <style:style style:name="P2" style:family="paragraph" style:parent-style-name="List_20_Paragraph">
      <style:paragraph-properties fo:margin-left="1.27cm" fo:margin-right="0cm" fo:text-indent="1.228cm" style:auto-text-indent="false"/>
    </style:style>
    <style:style style:name="P3" style:family="paragraph" style:parent-style-name="Standard">
      <style:text-properties officeooo:paragraph-rsid="0019c499"/>
    </style:style>
    <style:style style:name="P4" style:family="paragraph" style:parent-style-name="Standard">
      <style:text-properties officeooo:rsid="0019c499" officeooo:paragraph-rsid="0019c499"/>
    </style:style>
    <style:style style:name="P5" style:family="paragraph" style:parent-style-name="Standard">
      <style:text-properties fo:font-weight="bold" officeooo:rsid="001b87fe" officeooo:paragraph-rsid="001b87fe" style:font-weight-asian="bold" style:font-weight-complex="bold"/>
    </style:style>
    <style:style style:name="P6" style:family="paragraph" style:parent-style-name="Standard">
      <style:text-properties fo:font-weight="bold" officeooo:rsid="001d3dbc" officeooo:paragraph-rsid="001d3dbc" style:font-weight-asian="bold" style:font-weight-complex="bold"/>
    </style:style>
    <style:style style:name="P7" style:family="paragraph" style:parent-style-name="Standard">
      <style:text-properties fo:font-weight="bold" officeooo:rsid="0019c499" officeooo:paragraph-rsid="0019c499" style:font-weight-asian="bold" style:font-weight-complex="bold"/>
    </style:style>
    <style:style style:name="P8" style:family="paragraph" style:parent-style-name="Standard">
      <style:text-properties fo:font-weight="bold" officeooo:rsid="001fc8d4" officeooo:paragraph-rsid="001fc8d4" style:font-weight-asian="bold" style:font-weight-complex="bold"/>
    </style:style>
    <style:style style:name="P9" style:family="paragraph" style:parent-style-name="Standard">
      <style:text-properties fo:font-weight="bold" officeooo:rsid="00223430" officeooo:paragraph-rsid="00223430" style:font-weight-asian="bold" style:font-weight-complex="bold"/>
    </style:style>
    <style:style style:name="P10" style:family="paragraph" style:parent-style-name="Standard">
      <style:text-properties fo:font-weight="bold" officeooo:rsid="00241fa5" officeooo:paragraph-rsid="00241fa5" style:font-weight-asian="bold" style:font-weight-complex="bold"/>
    </style:style>
    <style:style style:name="P11" style:family="paragraph" style:parent-style-name="Standard">
      <style:text-properties fo:font-weight="bold" officeooo:rsid="0026666a" officeooo:paragraph-rsid="0026666a" style:font-weight-asian="bold" style:font-weight-complex="bold"/>
    </style:style>
    <style:style style:name="P12" style:family="paragraph" style:parent-style-name="Standard">
      <style:text-properties fo:font-weight="bold" officeooo:rsid="0026666a" officeooo:paragraph-rsid="00269e23" style:font-weight-asian="bold" style:font-weight-complex="bold"/>
    </style:style>
    <style:style style:name="P13" style:family="paragraph" style:parent-style-name="Standard">
      <style:text-properties fo:font-weight="bold" officeooo:rsid="00269e23" officeooo:paragraph-rsid="00269e23" style:font-weight-asian="bold" style:font-weight-complex="bold"/>
    </style:style>
    <style:style style:name="P14" style:family="paragraph" style:parent-style-name="Standard">
      <style:text-properties fo:font-weight="bold" officeooo:rsid="0027a267" officeooo:paragraph-rsid="0027a267" style:font-weight-asian="bold" style:font-weight-complex="bold"/>
    </style:style>
    <style:style style:name="P15" style:family="paragraph" style:parent-style-name="Standard">
      <style:text-properties fo:font-weight="bold" officeooo:rsid="0027a267" officeooo:paragraph-rsid="002b3834" style:font-weight-asian="bold" style:font-weight-complex="bold"/>
    </style:style>
    <style:style style:name="P16" style:family="paragraph" style:parent-style-name="Standard">
      <style:text-properties officeooo:rsid="001b87fe" officeooo:paragraph-rsid="001b87fe"/>
    </style:style>
    <style:style style:name="P17" style:family="paragraph" style:parent-style-name="Standard">
      <style:text-properties fo:font-weight="normal" officeooo:rsid="001b87fe" officeooo:paragraph-rsid="001b87fe" style:font-weight-asian="normal" style:font-weight-complex="normal"/>
    </style:style>
    <style:style style:name="P18" style:family="paragraph" style:parent-style-name="Standard">
      <style:text-properties fo:font-weight="normal" officeooo:rsid="001b87fe" officeooo:paragraph-rsid="001d3dbc" style:font-weight-asian="normal" style:font-weight-complex="normal"/>
    </style:style>
    <style:style style:name="P19" style:family="paragraph" style:parent-style-name="Standard">
      <style:text-properties fo:font-weight="normal" officeooo:rsid="001d3dbc" officeooo:paragraph-rsid="001d3dbc" style:font-weight-asian="normal" style:font-weight-complex="normal"/>
    </style:style>
    <style:style style:name="P20" style:family="paragraph" style:parent-style-name="Standard">
      <style:text-properties fo:font-weight="normal" officeooo:rsid="001fc8d4" officeooo:paragraph-rsid="001fc8d4" style:font-weight-asian="normal" style:font-weight-complex="normal"/>
    </style:style>
    <style:style style:name="P21" style:family="paragraph" style:parent-style-name="Standard">
      <style:text-properties fo:font-weight="normal" officeooo:rsid="00223430" officeooo:paragraph-rsid="00223430" style:font-weight-asian="normal" style:font-weight-complex="normal"/>
    </style:style>
    <style:style style:name="P22" style:family="paragraph" style:parent-style-name="Standard">
      <style:text-properties fo:font-weight="normal" officeooo:rsid="00258815" officeooo:paragraph-rsid="00258815" style:font-weight-asian="normal" style:font-weight-complex="normal"/>
    </style:style>
    <style:style style:name="P23" style:family="paragraph" style:parent-style-name="Standard">
      <style:text-properties fo:font-weight="normal" officeooo:rsid="00269e23" officeooo:paragraph-rsid="00269e23" style:font-weight-asian="normal" style:font-weight-complex="normal"/>
    </style:style>
    <style:style style:name="P24" style:family="paragraph" style:parent-style-name="Standard">
      <style:text-properties fo:font-weight="normal" officeooo:rsid="0027a267" officeooo:paragraph-rsid="0027a267" style:font-weight-asian="normal" style:font-weight-complex="normal"/>
    </style:style>
    <style:style style:name="P25" style:family="paragraph" style:parent-style-name="Standard">
      <style:text-properties fo:font-weight="normal" officeooo:rsid="002b3834" officeooo:paragraph-rsid="002b3834"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1b87fe" officeooo:paragraph-rsid="001b87fe" style:font-weight-asian="normal" style:font-weight-complex="normal"/>
    </style:style>
    <style:style style:name="P27" style:family="paragraph" style:parent-style-name="Standard">
      <style:text-properties style:text-underline-style="solid" style:text-underline-width="auto" style:text-underline-color="font-color" fo:font-weight="bold" officeooo:rsid="00223430" officeooo:paragraph-rsid="00223430" style:font-weight-asian="bold" style:font-weight-complex="bold"/>
    </style:style>
    <style:style style:name="P2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Standard">
      <style:text-properties officeooo:rsid="0027a267" officeooo:paragraph-rsid="0027a267"/>
    </style:style>
    <style:style style:name="P30" style:family="paragraph" style:parent-style-name="Standard">
      <style:text-properties fo:font-weight="bold" officeooo:rsid="002b3834" officeooo:paragraph-rsid="002b3834"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bold" officeooo:rsid="0027a267" officeooo:paragraph-rsid="0027a267" style:font-weight-asian="bold" style:font-weight-complex="bold"/>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CH" style:letter-kerning="true" style:font-name-asian="Calibri1" style:font-size-asian="11pt" style:language-asian="en" style:country-asian="US"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CH"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P35"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true" style:font-name-asian="Calibri1" style:font-size-asian="11pt" style:language-asian="en" style:country-asian="US"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CH" style:letter-kerning="true" style:font-name-asian="Calibri1" style:font-size-asian="11pt" style:language-asian="en" style:country-asian="US" style:font-size-complex="11pt" style:language-complex="ar" style:country-complex="S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de" fo:country="CH"/>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e5cdb" style:font-weight-asian="normal" style:font-weight-complex="normal"/>
    </style:style>
    <style:style style:name="T8" style:family="text">
      <style:text-properties fo:font-weight="normal" officeooo:rsid="001f2444" style:font-weight-asian="normal" style:font-weight-complex="normal"/>
    </style:style>
    <style:style style:name="T9" style:family="text">
      <style:text-properties fo:font-weight="normal" officeooo:rsid="0028516c" style:font-weight-asian="normal" style:font-weight-complex="normal"/>
    </style:style>
    <style:style style:name="T10" style:family="text">
      <style:text-properties officeooo:rsid="001fc8d4"/>
    </style:style>
    <style:style style:name="T11" style:family="text">
      <style:text-properties officeooo:rsid="00258815"/>
    </style:style>
    <style:style style:name="T12" style:family="text">
      <style:text-properties officeooo:rsid="002762d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STX50 <text:span text:style-name="T10">(SX5E)</text:span></text:p>
      <text:p text:style-name="P11"/>
      <text:p text:style-name="P14"/>
      <text:p text:style-name="P30">15.08.2024</text:p>
      <text:p text:style-name="P25">ESTX=4819<text:line-break/>IV=10.1 %</text:p>
      <text:p text:style-name="P25">I closed the call leg – wait until Friday to close the put spread</text:p>
      <text:p text:style-name="P15">6.08.2024</text:p>
      <text:p text:style-name="P24">ESTX50 = 4554<text:line-break/>IV = 20.4 %<text:line-break/>Following crash event from Aug 1/ Aug 2 / Aug 5 (black Monday), bought back call for 10 euros on Aug 5th and re-opened a new one on Aug 6th at 4875 (13 delta). ESTX50 lost nearly 5 %! <text:s/></text:p>
      <text:p text:style-name="P29"><text:span text:style-name="T6">- If ESTX50 goes back to 4800 I must close the trade (picture taken for Sep. 6, </text:span><text:span text:style-name="T9">ESTX50=4510</text:span><text:span text:style-name="T6">)</text:span></text:p>
      <text:p text:style-name="P24">- If ESTX50 goes down to 4510 I close the trade for a benefit of 600 USD.</text:p>
      <text:p text:style-name="P29"><text:span text:style-name="T6">Assumption : vol goes down to previous levels, </text:span><text:span text:style-name="T9">upside move is limited</text:span></text:p>
      <text:p text:style-name="P29"><draw:frame draw:style-name="fr5" draw:name="Image23" text:anchor-type="char" svg:width="16.002cm" svg:height="9.051cm" draw:z-index="25"><draw:image xlink:href="Pictures/100000010000046F000002823589FBA90004BEE4.png" xlink:type="simple" xlink:show="embed" xlink:actuate="onLoad" draw:mime-type="image/png"/></draw:frame><text:span text:style-name="T6"/></text:p>
      <text:p text:style-name="P14">26.07.2024</text:p>
      <text:p text:style-name="P24">This is not thought as an hedge to portfolio- Too much of a losing trade, but rather a trade on the weakness of ESTX50. I used support lines 4600/4500 for the September put spread and sold an August 15 delta call at 5025 to partially finance it.</text:p>
      <text:p text:style-name="P24"/>
      <text:p text:style-name="P29"><draw:frame draw:style-name="fr2" draw:name="Image22" text:anchor-type="char" svg:x="0cm" svg:y="0.141cm" svg:width="5.158cm" svg:height="5.646cm" draw:z-index="24"><draw:image xlink:href="Pictures/100000010000013C0000015A6548A72C0AB32ADC.png" xlink:type="simple" xlink:show="embed" xlink:actuate="onLoad" draw:mime-type="image/png"/></draw:frame><text:soft-page-break/><text:span text:style-name="T6"/></text:p>
      <text:p text:style-name="P14"/>
      <text:p text:style-name="P14"/>
      <text:p text:style-name="P14"/>
      <text:p text:style-name="P14"/>
      <text:p text:style-name="P14"/>
      <text:p text:style-name="P14"/>
      <text:p text:style-name="P14"/>
      <text:p text:style-name="P14">3.06.2024</text:p>
      <text:p text:style-name="P24">Got stopped out at begin of European session (9:00) for a significant loss. It seems that pre-market activity was already up. By not stopping out I would have only gained about 100 euros and still have to sell. I have to figure out why there are such wild moves.</text:p>
      <text:p text:style-name="P24">How to model these moves? Better to use put debit spread – less expensive so a <text:s/>15 delta call can be used instead of a 20 delta call.</text:p>
      <text:p text:style-name="P14">31.05.2024</text:p>
      <text:p text:style-name="P24">ESTX50 is below its 50-day EMA line. In general, it looks like it is worth taking a new hedge. I sold 20 delta call to finance a 4800 Put- </text:p>
      <text:p text:style-name="P24">Also added stop loss and take profit orders according to risk/reward. </text:p>
      <text:p text:style-name="P14">10.05.2024</text:p>
      <text:p text:style-name="P24">ESTX50 went once more to the upside – I closed it for a 240 USD loss (so OK)</text:p>
      <text:p text:style-name="P13">12.03.2024</text:p>
      <text:p text:style-name="P23">ESTX50 is at near ATH. Take protection on downside. <text:span text:style-name="T12">Max possible los is 440 USD – gain could go reasonably to 3’000 USD</text:span></text:p>
      <text:p text:style-name="P13"><draw:frame draw:style-name="fr3" draw:name="Image21" text:anchor-type="char" svg:width="15.244cm" svg:height="9.502cm" draw:z-index="23"><draw:image xlink:href="Pictures/10000001000004A40000032F85B1F7F2CD2B28B4.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29.01.2024</text:p>
      <text:p text:style-name="P12">Bilan actuel <text:s/>P<text:span text:style-name="T11">ut ESTX50 4500 Juin 2025</text:span></text:p>
      <text:p text:style-name="P11"><draw:frame draw:style-name="fr2" draw:name="Image20" text:anchor-type="char" svg:x="-0.053cm" svg:y="0.053cm" svg:width="7.805cm" svg:height="4.974cm" draw:z-index="22"><draw:image xlink:href="Pictures/1000000000000127000000BC26F4B25161A06329.png" xlink:type="simple" xlink:show="embed" xlink:actuate="onLoad" draw:mime-type="image/png"/></draw:frame></text:p>
      <text:p text:style-name="P10"/>
      <text:p text:style-name="P10"/>
      <text:p text:style-name="P10"><text:soft-page-break/></text:p>
      <text:p text:style-name="P10"/>
      <text:p text:style-name="P10"/>
      <text:p text:style-name="P10"/>
      <text:p text:style-name="P10"/>
      <text:p text:style-name="P10">3.01.2024</text:p>
      <text:p text:style-name="P10">Screenshot from IBKR TWS</text:p>
      <text:p text:style-name="P22"><draw:frame draw:style-name="fr3" draw:name="Image19" text:anchor-type="char" svg:width="24.702cm" svg:height="4.808cm" draw:z-index="21"><draw:image xlink:href="Pictures/10000001000006BE00000150CCE414F88F7D845C.png" xlink:type="simple" xlink:show="embed" xlink:actuate="onLoad" draw:mime-type="image/png"/></draw:frame>En un jour le put ESTX50 4500 Juin 2025 a pris 10 % de valeur – pour 1.5 % de baisse du sous-jacent</text:p>
      <text:p text:style-name="P8"/>
      <text:p text:style-name="P8">19.12.2023 SX5E<text:span text:style-name="T6"> = 4531</text:span></text:p>
      <text:p text:style-name="P20">In Feb 2000 indice was at 5413. It went down till 1800 (Mar 10, 2003). Then went all the way up till 4570 (Jun 2007). Down again to 1820 (Mar ‘09). So right now is highest value since Jul 16, 2007. </text:p>
      <text:p text:style-name="P20">A couple of downturns in SX5E :</text:p>
      <text:p text:style-name="P8"><draw:frame draw:style-name="fr2" draw:name="Image14" text:anchor-type="char" svg:x="-0.168cm" svg:y="0.141cm" svg:width="15.584cm" svg:height="5.874cm" draw:z-index="16"><draw:image xlink:href="Pictures/100000000000024D000000DEE4E791C4CD61106F.png" xlink:type="simple" xlink:show="embed" xlink:actuate="onLoad" draw:mime-type="image/png"/></draw:frame></text:p>
      <text:p text:style-name="P20"/>
      <text:p text:style-name="P20"/>
      <text:p text:style-name="P20"/>
      <text:p text:style-name="P20"/>
      <text:p text:style-name="P20"/>
      <text:p text:style-name="P20"/>
      <text:p text:style-name="P20"/>
      <text:p text:style-name="P27">Impact taux d’intérêts</text:p>
      <text:p text:style-name="P9">Si baisse des taux de 4 %à 1 %</text:p>
      <text:p text:style-name="P21"/>
      <text:p text:style-name="P8"><text:span text:style-name="T4">Scénario 1</text:span><text:span text:style-name="T6"> : Ne bouge pas jusque juin 2024 puis baisse de 30 % sur 9 mois de juin 2024 jusque mars 2025 (3200). Pas de relation avec les élections US en novembre 2024.</text:span></text:p>
      <text:p text:style-name="P8"><text:soft-page-break/><text:span text:style-name="T6">Juin 2024 : -500$/-1900$ selon la volatilité (Vega=21, soit </text:span><text:span text:style-name="T5">840$ for each vol point</text:span><text:span text:style-name="T6"> in price → vol entre 22.5 % et 20.5 %</text:span></text:p>
      <text:p text:style-name="P8"><draw:frame draw:style-name="fr2" draw:name="Image15" text:anchor-type="char" svg:x="-0.229cm" svg:y="0.088cm" svg:width="24.702cm" svg:height="2.822cm" draw:z-index="17"><draw:image xlink:href="Pictures/10000001000004A6000000881E79E6D1B5636960.png" xlink:type="simple" xlink:show="embed" xlink:actuate="onLoad" draw:mime-type="image/png"/></draw:frame><text:span text:style-name="T6"/></text:p>
      <text:p text:style-name="P8"><text:span text:style-name="T4">Scénario 2</text:span> <text:span text:style-name="T6">: Ne bouge pas jusque octobre 2024 puis 9 mois de baisse jusque juin 2025</text:span></text:p>
      <text:p text:style-name="P20">Juin 2024 : Baisse de 2600$/3700$ selon volatilité (20.5/22.5%)</text:p>
      <text:p text:style-name="P8"><draw:frame draw:style-name="fr4" draw:name="Image16" text:anchor-type="char" svg:width="24.702cm" svg:height="2.808cm" draw:z-index="18"><draw:image xlink:href="Pictures/10000001000004A3000000871C9B575D223A424E.png" xlink:type="simple" xlink:show="embed" xlink:actuate="onLoad" draw:mime-type="image/png"/></draw:frame><text:span text:style-name="T6"/></text:p>
      <text:p text:style-name="P20"/>
      <text:p text:style-name="P8"><text:span text:style-name="T4">Scénario 3</text:span><text:span text:style-name="T6"> : Baisse jusqu’à 4300 (-5%) jusque juin 2024 puis remonte jusqu’à 4800</text:span></text:p>
      <text:p text:style-name="P20">Baisse jusque juin 2024</text:p>
      <text:p text:style-name="P8"><draw:frame draw:style-name="fr4" draw:name="Image17" text:anchor-type="char" svg:width="24.702cm" svg:height="2.731cm" draw:z-index="19"><draw:image xlink:href="Pictures/10000001000004AA000000846A82B7164E0D12A5.png" xlink:type="simple" xlink:show="embed" xlink:actuate="onLoad" draw:mime-type="image/png"/></draw:frame><text:span text:style-name="T6"/></text:p>
      <text:p text:style-name="P20">Puis remontée à 4800</text:p>
      <text:p text:style-name="P8"><draw:frame draw:style-name="fr4" draw:name="Image18" text:anchor-type="char" svg:width="24.702cm" svg:height="2.803cm" draw:z-index="20"><draw:image xlink:href="Pictures/10000001000004A50000008760B8061DB2819EF5.png" xlink:type="simple" xlink:show="embed" xlink:actuate="onLoad" draw:mime-type="image/png"/></draw:frame><text:span text:style-name="T6"/></text:p>
      <text:p text:style-name="P8"><draw:frame draw:style-name="fr2" draw:name="Image13" text:anchor-type="char" svg:x="0.035cm" svg:y="0.436cm" svg:width="22.934cm" svg:height="14.54cm" draw:z-index="15"><draw:image xlink:href="Pictures/10000001000004B2000002FA335EB8EA285D7A99.png" xlink:type="simple" xlink:show="embed" xlink:actuate="onLoad" draw:mime-type="image/png"/></draw:frame><text:soft-page-break/><text:span text:style-name="T6"/></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6"/>
      <text:p text:style-name="P6"/>
      <text:p text:style-name="P6"/>
      <text:p text:style-name="P6"><draw:frame draw:style-name="fr2" draw:name="Image12" text:anchor-type="char" svg:x="0.018cm" svg:y="-0.009cm" svg:width="16.815cm" svg:height="14.596cm" draw:z-index="14"><draw:image xlink:href="Pictures/10000001000002D700000277E8CE9FD21803C558.png" xlink:type="simple" xlink:show="embed" xlink:actuate="onLoad" draw:mime-type="image/png"/></draw:frame></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8.11.2023 <text:span text:style-name="T6">ESTX50=4178</text:span></text:p>
      <text:p text:style-name="P6"><text:span text:style-name="T6">L’idée est de vendre 2 Bear Calls 4400/4300 ou 4350/42</text:span><text:span text:style-name="T8">5</text:span><text:span text:style-name="T6">0 – au 1</text:span><text:span text:style-name="T7">5</text:span><text:span text:style-name="T6"> Déc :</text:span></text:p>
      <text:p text:style-name="P6"><draw:frame draw:style-name="fr3" draw:name="Image10" text:anchor-type="char" svg:width="24.702cm" svg:height="10.753cm" draw:z-index="12"><draw:image xlink:href="Pictures/10000001000004B60000020D2F7CC60D44BBD4DC.png" xlink:type="simple" xlink:show="embed" xlink:actuate="onLoad" draw:mime-type="image/png"/></draw:frame><text:span text:style-name="T6"/></text:p>
      <text:p text:style-name="P19"/>
      <text:p text:style-name="P5"/>
      <text:p text:style-name="P5"><text:soft-page-break/></text:p>
      <text:p text:style-name="P5"><draw:frame draw:style-name="fr2" draw:name="Image11" text:anchor-type="char" svg:x="0.109cm" svg:y="-0.065cm" svg:width="15.032cm" svg:height="7.684cm" draw:z-index="13"><draw:image xlink:href="Pictures/10000001000003240000019B944505C87561031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11.10.2023 <text:span text:style-name="T6">ESTX50=4205</text:span></text:p>
      <text:p text:style-name="P18">L’idée est de dégrossir le bear put qui est trop sensible et de vendre un bear call en même temps </text:p>
      <text:p text:style-name="P17"><draw:frame draw:style-name="fr2" draw:name="Image9" text:anchor-type="char" svg:x="0.646cm" svg:y="-0.139cm" svg:width="14.864cm" svg:height="6.135cm" draw:z-index="11"><draw:image xlink:href="Pictures/1000000100000475000001D7FC80541E4FB74B9F.png" xlink:type="simple" xlink:show="embed" xlink:actuate="onLoad" draw:mime-type="image/png"/></draw:frame></text:p>
      <text:p text:style-name="P17"/>
      <text:p text:style-name="P26"/>
      <text:p text:style-name="P26"/>
      <text:p text:style-name="P18"/>
      <text:p text:style-name="P18"/>
      <text:p text:style-name="P18"/>
      <text:p text:style-name="P18"/>
      <text:p text:style-name="P18">Le plus probable au 8 novembre est l’intervalle 4200-4300 si rebond et 3900-4100 si descente :</text:p>
      <text:p text:style-name="P26">SC1 : 0 % dans 28j (Me 8 novembre)</text:p>
      <text:p text:style-name="P16">Sc2 : +5 % d’ici le 8 novembre – ESTX50=4415 – perte = -1660 € vs -1213 <text:s/>€</text:p>
      <text:p text:style-name="P16">Sc3 : -4.87 % d’ici le 8 novembre – ESTX50=4000 gain= 2607€ vs 1230 €</text:p>
      <text:p text:style-name="Standard"><draw:frame draw:style-name="fr2" draw:name="Image8" text:anchor-type="char" svg:x="-0.342cm" svg:y="-0.074cm" svg:width="15.79cm" svg:height="13.566cm" draw:z-index="10"><draw:image xlink:href="Pictures/10000001000004E8000004376FA866E1094F909F.png" xlink:type="simple" xlink:show="embed" xlink:actuate="onLoad" draw:mime-type="image/png"/></draw:frame><text:soft-page-break/></text:p>
      <text:p text:style-name="Standard"/>
      <text:p text:style-name="Standard"/>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8.10.2023</text:p>
      <text:p text:style-name="P4">If ESTX50 goes up and that 4500/440 ESTX50 bear call gains more value, then it may be worth taking a bear call.</text:p>
      <text:p text:style-name="P4">4300/4200 ESTX50 is another interesting prop.</text:p>
      <text:p text:style-name="P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 loext:marker-style-name="T1"><text:span text:style-name="T1">2.06.2023</text:span><text:span text:style-name="T1"/></text:p>
          </table:table-cell>
          <table:table-cell table:style-name="Tableau1.A1" office:value-type="string">
            <text:p text:style-name="P1">Portefeuille Gonet EuroStock+SMI=215185 CHF soit</text:p>
            <text:p text:style-name="P1">Soit 237 kUSD / (10x4310) = 5 contrats ESTX50</text:p>
            <text:p text:style-name="P1" loext:marker-style-name="T2"><text:span text:style-name="T2">Decision is to buy 2 Bear Put spread 4075/3700 18-Aug</text:span><text:span text:style-name="T2"/></text:p>
          </table:table-cell>
          <table:table-cell table:style-name="Tableau1.A1" office:value-type="string">
            <text:p text:style-name="P1">Fib extension based upon last down move<text:soft-page-break/><draw:frame draw:style-name="fr1" draw:name="Image 1" text:anchor-type="as-char" svg:width="14.736cm" svg:height="8.983cm" draw:z-index="0"><draw:image xlink:href="Pictures/10000001000003DD0000025B9A40B5E12866422C.png" xlink:type="simple" xlink:show="embed" xlink:actuate="onLoad" draw:mime-type="image/png"/></draw:frame></text:p>
            <text:p text:style-name="P1"/>
            <text:p text:style-name="P1">SC1 : Baisse de -7% d’ici le 22.07 -&gt; Spread and simple put offer same protection</text:p>
            <text:p text:style-name="P1"><draw:frame draw:style-name="fr1" draw:name="Image3" text:anchor-type="as-char" svg:width="16.535cm" svg:height="6.983cm" draw:z-index="1"><draw:image xlink:href="Pictures/1000000100000643000002A5B24C059CF599405A.png" xlink:type="simple" xlink:show="embed" xlink:actuate="onLoad" draw:mime-type="image/png"/></draw:frame></text:p>
            <text:p text:style-name="P1" loext:marker-style-name="T3"><text:span text:style-name="T3">Same if move happens before end of June:</text:span><text:span text:style-name="T3"/></text:p>
            <text:p text:style-name="P35" loext:marker-style-name="T3"><draw:frame draw:style-name="fr1" draw:name="Image4" text:anchor-type="as-char" svg:width="15.616cm" svg:height="6.96cm" draw:z-index="2"><draw:image xlink:href="Pictures/10000001000003E6000001BD755E259D5CE658B0.png" xlink:type="simple" xlink:show="embed" xlink:actuate="onLoad" draw:mime-type="image/png"/></draw:frame></text:p>
            <text:p text:style-name="P36" loext:marker-style-name="T3"><text:soft-page-break/></text:p>
            <text:p text:style-name="P1" loext:marker-style-name="T3">Sc2 : Baisse de -14% d’ici le 22.07 -&gt; Simple put is much better, but this is unlikely. <text:span text:style-name="T3">It it was going to happen, it would take 9 months or so.</text:span><text:span text:style-name="T3"/></text:p>
            <text:p text:style-name="P1"><draw:frame draw:style-name="fr1" draw:name="Image5" text:anchor-type="as-char" svg:width="9.197cm" svg:height="4.293cm" draw:z-index="3"><draw:image xlink:href="Pictures/10000001000003E4000001D18F02D89D5C4220ED.png" xlink:type="simple" xlink:show="embed" xlink:actuate="onLoad" draw:mime-type="image/png"/></draw:frame></text:p>
          </table:table-cell>
        </table:table-row>
        <table:table-row table:style-name="Tableau1.1">
          <table:table-cell table:style-name="Tableau1.A1" office:value-type="string">
            <text:p text:style-name="P1" loext:marker-style-name="T1"><text:span text:style-name="T1">12.04.2023</text:span><text:span text:style-name="T1"/></text:p>
          </table:table-cell>
          <table:table-cell table:style-name="Tableau1.A1" office:value-type="string">
            <text:p text:style-name="P1">Valeurs du CAC40 + SMI=31605+25029+23539+14612 EUR, 22560+22496+17013 CHF</text:p>
            <text:p text:style-name="P1">94785 € + 62069 CHF = 158 095 € de notionnel</text:p>
            <text:p text:style-name="P1">ESTX50=4354 € -&gt; 36,31 shares soit 4 options Put/Call (mul=10)</text:p>
            <text:p text:style-name="P1"/>
            <text:p text:style-name="P1" loext:marker-style-name="T4"><text:span text:style-name="T4">Sc1 : -15% d’ici le 19.05</text:span><text:span text:style-name="T4"/></text:p>
            <text:p text:style-name="P1"/>
          </table:table-cell>
          <table:table-cell table:style-name="Tableau1.A1" office:value-type="string">
            <text:p text:style-name="P1"><draw:frame draw:style-name="fr1" draw:name="Image 5" text:anchor-type="as-char" svg:width="16.002cm" svg:height="6.482cm" draw:z-index="4"><draw:image xlink:href="Pictures/10000001000006FB000002D44FECD0786FA114D5.png" xlink:type="simple" xlink:show="embed" xlink:actuate="onLoad" draw:mime-type="image/png"/></draw:frame></text:p>
          </table:table-cell>
        </table:table-row>
        <table:table-row table:style-name="Tableau1.1">
          <table:table-cell table:style-name="Tableau1.A1" office:value-type="string">
            <text:p text:style-name="P34" loext:marker-style-name="T1"/>
          </table:table-cell>
          <table:table-cell table:style-name="Tableau1.A1" office:value-type="string">
            <text:p text:style-name="P1" loext:marker-style-name="T4"><text:span text:style-name="T4">Sc2 :+3% d’ici le 19.05</text:span><text:span text:style-name="T4"/></text:p>
            <text:p text:style-name="P1"/>
          </table:table-cell>
          <table:table-cell table:style-name="Tableau1.A1" office:value-type="string">
            <text:p text:style-name="P1"><draw:frame draw:style-name="fr1" draw:name="Image 6" text:anchor-type="as-char" svg:width="16.002cm" svg:height="6.447cm" draw:z-index="5"><draw:image xlink:href="Pictures/100000010000070F000002D888AA3C6958AAA796.png" xlink:type="simple" xlink:show="embed" xlink:actuate="onLoad" draw:mime-type="image/png"/></draw:frame></text:p>
          </table:table-cell>
        </table:table-row>
        <text:soft-page-break/>
        <table:table-row table:style-name="Tableau1.1">
          <table:table-cell table:style-name="Tableau1.A1" office:value-type="string">
            <text:p text:style-name="P1" loext:marker-style-name="T1"><text:span text:style-name="T1">5.04.2023</text:span><text:span text:style-name="T1"/></text:p>
          </table:table-cell>
          <table:table-cell table:style-name="Tableau1.A1" office:value-type="string">
            <text:p text:style-name="P1">Valeurs du CAC40 : 89.8 k€ </text:p>
            <text:p text:style-name="P1">Hedging : ESTX50 à 4169, multiplier=10 soit 2 contrats= 83.4 k€</text:p>
            <text:p text:style-name="P1" loext:marker-style-name="T1"><text:span text:style-name="T1">Cas défavorable si ESTX50 dépasse son max de janvier 2022 (peu probable) :</text:span><text:span text:style-name="T1"/></text:p>
          </table:table-cell>
          <table:table-cell table:style-name="Tableau1.A1" office:value-type="string">
            <text:p text:style-name="P1"><text:s/><draw:frame draw:style-name="fr1" draw:name="Image7" text:anchor-type="as-char" svg:width="16.002cm" svg:height="6.234cm" draw:z-index="6"><draw:image xlink:href="Pictures/1000000100000700000002BA86957A43ED6E98E5.png" xlink:type="simple" xlink:show="embed" xlink:actuate="onLoad" draw:mime-type="image/png"/></draw:frame></text:p>
          </table:table-cell>
        </table:table-row>
        <table:table-row table:style-name="Tableau1.1">
          <table:table-cell table:style-name="Tableau1.A1" office:value-type="string">
            <text:p text:style-name="P34" loext:marker-style-name="T1"/>
          </table:table-cell>
          <table:table-cell table:style-name="Tableau1.A1" office:value-type="string">
            <text:p text:style-name="P1">Cas moyennement favorable si ESTX50 baisse de 0.5% d’ici fin mai</text:p>
          </table:table-cell>
          <table:table-cell table:style-name="Tableau1.A1" office:value-type="string">
            <text:p text:style-name="P1"><draw:frame draw:style-name="fr1" draw:name="Image 3" text:anchor-type="as-char" svg:width="16.002cm" svg:height="6.361cm" draw:z-index="7"><draw:image xlink:href="Pictures/10000001000006F5000002C498F5F92BDEE20BCC.png" xlink:type="simple" xlink:show="embed" xlink:actuate="onLoad" draw:mime-type="image/png"/></draw:frame></text:p>
          </table:table-cell>
        </table:table-row>
        <table:table-row table:style-name="Tableau1.1">
          <table:table-cell table:style-name="Tableau1.A1" office:value-type="string">
            <text:p text:style-name="P34" loext:marker-style-name="T1"/>
          </table:table-cell>
          <table:table-cell table:style-name="Tableau1.A1" office:value-type="string">
            <text:p text:style-name="P1">Cas favorable si ESTX50 baisse de 2% d’ici mi-juin</text:p>
          </table:table-cell>
          <table:table-cell table:style-name="Tableau1.A1" office:value-type="string">
            <text:p text:style-name="P1"><draw:frame draw:style-name="fr1" draw:name="Image 2" text:anchor-type="as-char" svg:width="16.002cm" svg:height="6.419cm" draw:z-index="8"><draw:image xlink:href="Pictures/1000000100000703000002D0D7A2C212E113D491.png" xlink:type="simple" xlink:show="embed" xlink:actuate="onLoad" draw:mime-type="image/png"/></draw:frame></text:p>
          </table:table-cell>
        </table:table-row>
        <text:soft-page-break/>
        <table:table-row table:style-name="Tableau1.1">
          <table:table-cell table:style-name="Tableau1.A1" office:value-type="string">
            <text:p text:style-name="P34" loext:marker-style-name="T1"/>
          </table:table-cell>
          <table:table-cell table:style-name="Tableau1.A1" office:value-type="string">
            <text:p text:style-name="P1">Cas très favorable si ESTX baisse de 6.2% d’ici mi-mai :</text:p>
          </table:table-cell>
          <table:table-cell table:style-name="Tableau1.A1" office:value-type="string">
            <text:p text:style-name="P1"><draw:frame draw:style-name="fr1" draw:name="Image 4" text:anchor-type="as-char" svg:width="16.002cm" svg:height="6.382cm" draw:z-index="9"><draw:image xlink:href="Pictures/1000000100000701000002CB628B360F4C2F3962.png" xlink:type="simple" xlink:show="embed" xlink:actuate="onLoad" draw:mime-type="image/png"/><svg:desc>Une image contenant texte, capture d’écran, intérieur

Description générée automatiquement</svg:desc></draw:frame></text:p>
          </table:table-cell>
        </table:table-row>
      </table:table>
      <text:p text:style-name="Standard"/>
      <text:p text:style-name="P31" loext:marker-style-name="T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CH"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CH"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exis Martin</meta:initial-creator>
    <meta:editing-cycles>28</meta:editing-cycles>
    <meta:creation-date>2023-04-04T19:59:00</meta:creation-date>
    <dc:date>2025-06-13T12:03:36.335000000</dc:date>
    <meta:editing-duration>P6DT15H31M54S</meta:editing-duration>
    <meta:generator>LibreOffice/7.5.7.1$Windows_X86_64 LibreOffice_project/47eb0cf7efbacdee9b19ae25d6752381ede23126</meta:generator>
    <meta:document-statistic meta:table-count="1" meta:image-count="26" meta:object-count="0" meta:page-count="14" meta:paragraph-count="79" meta:word-count="837" meta:character-count="4384" meta:non-whitespace-character-count="3597"/>
    <meta:user-defined meta:name="AppVersion">16.0000</meta:user-defined>
    <meta:template xlink:type="simple" xlink:actuate="onRequest" xlink:title="Normal.dotm" xlink:href=""/>
  </office:meta>
</office:document-meta>
</file>
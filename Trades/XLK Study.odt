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AB000003F310C27FAB9A7CC668.png" manifest:media-type="image/png"/>
  <manifest:file-entry manifest:full-path="Pictures/10000001000004BA000003FCA4E5EDD4048B38B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52e5" officeooo:paragraph-rsid="001f52e5"/>
    </style:style>
    <style:style style:name="P2" style:family="paragraph" style:parent-style-name="Standard">
      <style:text-properties fo:font-weight="bold" officeooo:rsid="001f52e5" officeooo:paragraph-rsid="001f52e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4.01.2025 14:17 <text:span text:style-name="T1">expiration</text:span> <text:span text:style-name="T1">21 février</text:span></text:p>
      <text:p text:style-name="P1"><draw:frame draw:style-name="fr2" draw:name="Image1" text:anchor-type="char" svg:x="-0.065cm" svg:y="0.386cm" svg:width="17.186cm" svg:height="14.54cm" draw:z-index="0"><draw:image xlink:href="Pictures/10000001000004AB000003F310C27FAB9A7CC66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14:22 expiration 7 février</text:p>
      <text:p text:style-name="P1"><draw:frame draw:style-name="fr1" draw:name="Image2" text:anchor-type="char" svg:width="17cm" svg:height="14.33cm" draw:z-index="1"><draw:image xlink:href="Pictures/10000001000004BA000003FCA4E5EDD4048B38B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4T14:17:29.953000000</meta:creation-date>
    <dc:date>2025-01-24T14:23:02.997000000</dc:date>
    <meta:editing-duration>PT5M33S</meta:editing-duration>
    <meta:editing-cycles>1</meta:editing-cycles>
    <meta:document-statistic meta:table-count="0" meta:image-count="2" meta:object-count="0" meta:page-count="2" meta:paragraph-count="2" meta:word-count="9" meta:character-count="64" meta:non-whitespace-character-count="57"/>
    <meta:generator>LibreOffice/7.5.7.1$Windows_X86_64 LibreOffice_project/47eb0cf7efbacdee9b19ae25d6752381ede23126</meta:generator>
  </office:meta>
</office:document-meta>
</file>
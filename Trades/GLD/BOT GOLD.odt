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E0000026FB728163E5C52DAE1.png" manifest:media-type="image/png"/>
  <manifest:file-entry manifest:full-path="Pictures/100000010000027D0000002350A69F8B6D701E2F.png" manifest:media-type="image/png"/>
  <manifest:file-entry manifest:full-path="Pictures/10000001000004BD0000028FD4400824680C7CF2.png" manifest:media-type="image/png"/>
  <manifest:file-entry manifest:full-path="Pictures/10000001000002CB0000003AEDF60831C1EB31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337" officeooo:paragraph-rsid="00072337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T GOLD </text:p>
      <text:p text:style-name="P1">14.11.2023</text:p>
      <text:p text:style-name="P1"/>
      <text:p text:style-name="P1"><draw:line text:anchor-type="paragraph" draw:z-index="0" draw:name="Ligne horizontale 1" draw:style-name="gr1" draw:text-style-name="P2" svg:x1="-0.84cm" svg:y1="0.34cm" svg:x2="16.623cm" svg:y2="0.34cm"><text:p text:style-name="P2"/><text:p text:style-name="P2"/><text:p text:style-name="P2"/><text:p text:style-name="P3"><text:s/></text:p></draw:line>It has retraced the Fib and price action looks promising :</text:p>
      <text:p text:style-name="P1"/>
      <text:p text:style-name="P1"/>
      <text:p text:style-name="P1"><draw:frame draw:style-name="fr2" draw:name="Image1" text:anchor-type="char" svg:width="15.302cm" svg:height="9.786cm" draw:z-index="1"><draw:image xlink:href="Pictures/10000001000003CE0000026FB728163E5C52DAE1.png" xlink:type="simple" xlink:show="embed" xlink:actuate="onLoad" draw:mime-type="image/png"/></draw:frame>It could easily go to 17 and beyond by early Dec</text:p>
      <text:p text:style-name="P1"/>
      <text:p text:style-name="P1">Notice that Call 16 is cheaper than Call 17 (29 % vs 31 % IV)</text:p>
      <text:p text:style-name="P1"/>
      <text:p text:style-name="P1">For Dec 15 expiration :</text:p>
      <text:p text:style-name="P1"/>
      <text:p text:style-name="P1"><draw:frame draw:style-name="fr2" draw:name="Image3" text:anchor-type="char" svg:width="16.856cm" svg:height="0.926cm" draw:z-index="3"><draw:image xlink:href="Pictures/100000010000027D0000002350A69F8B6D701E2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width="17cm" svg:height="1.378cm" draw:z-index="2"><draw:image xlink:href="Pictures/10000001000002CB0000003AEDF60831C1EB317C.png" xlink:type="simple" xlink:show="embed" xlink:actuate="onLoad" draw:mime-type="image/png"/></draw:frame><draw:frame draw:style-name="fr1" draw:name="Image4" text:anchor-type="char" svg:width="17cm" svg:height="9.179cm" draw:z-index="4"><draw:image xlink:href="Pictures/10000001000004BD0000028FD4400824680C7CF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8:44:08.824000000</meta:creation-date>
    <dc:date>2023-11-14T19:15:34.566000000</dc:date>
    <meta:editing-duration>PT31M26S</meta:editing-duration>
    <meta:editing-cycles>1</meta:editing-cycles>
    <meta:document-statistic meta:table-count="0" meta:image-count="4" meta:object-count="0" meta:page-count="2" meta:paragraph-count="6" meta:word-count="45" meta:character-count="209" meta:non-whitespace-character-count="169"/>
    <meta:generator>LibreOffice/7.5.7.1$Windows_X86_64 LibreOffice_project/47eb0cf7efbacdee9b19ae25d6752381ede23126</meta:generator>
  </office:meta>
</office:document-meta>
</file>
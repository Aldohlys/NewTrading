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D100000195400D637DD87F0186.png" manifest:media-type="image/png"/>
  <manifest:file-entry manifest:full-path="Pictures/10000001000004C700000195194002B8EF6600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bf2" officeooo:paragraph-rsid="00152bf2"/>
    </style:style>
    <style:style style:name="P2" style:family="paragraph" style:parent-style-name="Standard">
      <style:text-properties style:text-underline-style="solid" style:text-underline-width="auto" style:text-underline-color="font-color" officeooo:rsid="00152bf2" officeooo:paragraph-rsid="00152bf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2bf2" officeooo:paragraph-rsid="00152bf2" style:font-weight-asian="bold" style:font-weight-complex="bold"/>
    </style:style>
    <style:style style:name="P4" style:family="paragraph" style:parent-style-name="Standard">
      <style:text-properties fo:font-weight="bold" officeooo:rsid="00152bf2" officeooo:paragraph-rsid="00152bf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LD</text:p>
      <text:p text:style-name="P1">1.10.2025</text:p>
      <text:p text:style-name="P1"/>
      <text:p text:style-name="P1">Initial : Bull Call 350/355</text:p>
      <text:p text:style-name="P1">Price = 345$</text:p>
      <text:p text:style-name="P1"><draw:frame draw:style-name="fr2" draw:name="Image1" text:anchor-type="char" svg:width="17cm" svg:height="5.921cm" draw:z-index="0"><draw:image xlink:href="Pictures/10000001000004D100000195400D637DD87F0186.png" xlink:type="simple" xlink:show="embed" xlink:actuate="onLoad" draw:mime-type="image/png"/></draw:frame></text:p>
      <text:p text:style-name="P3">Scenario 1 :</text:p>
      <text:p text:style-name="P1">Rachat Call 355, vente Call 360</text:p>
      <text:p text:style-name="P4"><draw:frame draw:style-name="fr1" draw:name="Image2" text:anchor-type="char" svg:x="0cm" svg:y="0.09cm" svg:width="17cm" svg:height="5.629cm" draw:z-index="1"><draw:image xlink:href="Pictures/10000001000004C700000195194002B8EF660001.png" xlink:type="simple" xlink:show="embed" xlink:actuate="onLoad" draw:mime-type="image/png"/></draw:frame><text:span text:style-name="T1"/></text:p>
      <text:p text:style-name="P4"><text:span text:style-name="T1">Scenario 2</text:span></text:p>
      <text:p text:style-name="P2">Vente Bull Call 350/355, achat bull call 355/36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1:35:14.343000000</meta:creation-date>
    <dc:date>2025-10-02T23:14:24.996000000</dc:date>
    <meta:editing-duration>P1DT11H39M11S</meta:editing-duration>
    <meta:editing-cycles>1</meta:editing-cycles>
    <meta:document-statistic meta:table-count="0" meta:image-count="2" meta:object-count="0" meta:page-count="1" meta:paragraph-count="8" meta:word-count="29" meta:character-count="153" meta:non-whitespace-character-count="132"/>
    <meta:generator>LibreOffice/7.5.7.1$Windows_X86_64 LibreOffice_project/47eb0cf7efbacdee9b19ae25d6752381ede23126</meta:generator>
  </office:meta>
</office:document-meta>
</file>
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0000001F875EA42470F52274D.png" manifest:media-type="image/png"/>
  <manifest:file-entry manifest:full-path="Pictures/1000000100000472000002455A2851459F38E467.png" manifest:media-type="image/png"/>
  <manifest:file-entry manifest:full-path="Pictures/10000001000003F800000419B096492F0F40226C.png" manifest:media-type="image/png"/>
  <manifest:file-entry manifest:full-path="Pictures/100000010000030900000179BFF1BC1BD9BBF75C.png" manifest:media-type="image/png"/>
  <manifest:file-entry manifest:full-path="Pictures/10000001000004AF00000309280A4878F45BC289.png" manifest:media-type="image/png"/>
  <manifest:file-entry manifest:full-path="Pictures/10000001000004C100000205D0A179622B6447FF.png" manifest:media-type="image/png"/>
  <manifest:file-entry manifest:full-path="Pictures/10000001000004C600000207B27B4F2307332B5B.png" manifest:media-type="image/png"/>
  <manifest:file-entry manifest:full-path="Pictures/10000001000004A60000028D2A83FF5D0BF8E34C.png" manifest:media-type="image/png"/>
  <manifest:file-entry manifest:full-path="Pictures/10000001000003BB0000015C08CAED41CEE5F7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099cm" style:rel-column-width="1758*"/>
    </style:style>
    <style:style style:name="Tableau1.B" style:family="table-column">
      <style:table-column-properties style:column-width="1.448cm" style:rel-column-width="821*"/>
    </style:style>
    <style:style style:name="Tableau1.C" style:family="table-column">
      <style:table-column-properties style:column-width="1.452cm" style:rel-column-width="823*"/>
    </style:style>
    <style:style style:name="Tableau1.D" style:family="table-column">
      <style:table-column-properties style:column-width="4.089cm" style:rel-column-width="2319*"/>
    </style:style>
    <style:style style:name="Tableau1.E" style:family="table-column">
      <style:table-column-properties style:column-width="3.186cm" style:rel-column-width="1807*"/>
    </style:style>
    <style:style style:name="Tableau1.F" style:family="table-column">
      <style:table-column-properties style:column-width="3.729cm" style:rel-column-width="211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f403" officeooo:paragraph-rsid="0009f403"/>
    </style:style>
    <style:style style:name="P2" style:family="paragraph" style:parent-style-name="Standard">
      <style:text-properties officeooo:rsid="0009f403" officeooo:paragraph-rsid="000bdc2f"/>
    </style:style>
    <style:style style:name="P3" style:family="paragraph" style:parent-style-name="Standard">
      <style:text-properties officeooo:rsid="0009f403" officeooo:paragraph-rsid="000c3f89"/>
    </style:style>
    <style:style style:name="P4" style:family="paragraph" style:parent-style-name="Standard">
      <style:text-properties officeooo:rsid="000aef5e" officeooo:paragraph-rsid="0009f403"/>
    </style:style>
    <style:style style:name="P5" style:family="paragraph" style:parent-style-name="Standard">
      <style:text-properties officeooo:rsid="000aef5e" officeooo:paragraph-rsid="000aef5e"/>
    </style:style>
    <style:style style:name="P6" style:family="paragraph" style:parent-style-name="Standard">
      <style:text-properties officeooo:rsid="000aef5e" officeooo:paragraph-rsid="000bdc2f"/>
    </style:style>
    <style:style style:name="P7" style:family="paragraph" style:parent-style-name="Standard">
      <style:text-properties officeooo:rsid="000aef5e" officeooo:paragraph-rsid="000c3f89"/>
    </style:style>
    <style:style style:name="P8" style:family="paragraph" style:parent-style-name="Standard">
      <style:text-properties officeooo:rsid="000aef5e" officeooo:paragraph-rsid="000ed890"/>
    </style:style>
    <style:style style:name="P9" style:family="paragraph" style:parent-style-name="Standard">
      <style:text-properties officeooo:rsid="000bdc2f" officeooo:paragraph-rsid="000bdc2f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bdc2f" officeooo:paragraph-rsid="000bdc2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bdc2f" officeooo:paragraph-rsid="000bdc2f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0c32c2" officeooo:paragraph-rsid="000c32c2"/>
    </style:style>
    <style:style style:name="P13" style:family="paragraph" style:parent-style-name="Standard">
      <style:text-properties officeooo:rsid="000c3f89" officeooo:paragraph-rsid="000c3f89"/>
    </style:style>
    <style:style style:name="P14" style:family="paragraph" style:parent-style-name="Standard">
      <style:text-properties officeooo:rsid="000ed890" officeooo:paragraph-rsid="000ed890"/>
    </style:style>
    <style:style style:name="P15" style:family="paragraph" style:parent-style-name="Standard">
      <style:text-properties officeooo:rsid="0010be21" officeooo:paragraph-rsid="0010be21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0be21" officeooo:paragraph-rsid="0010be21" style:font-weight-asian="bold" style:font-weight-complex="bold"/>
    </style:style>
    <style:style style:name="P17" style:family="paragraph" style:parent-style-name="Standard">
      <style:text-properties officeooo:rsid="000aef5e" officeooo:paragraph-rsid="0010be21"/>
    </style:style>
    <style:style style:name="P18" style:family="paragraph" style:parent-style-name="Standard">
      <style:text-properties officeooo:rsid="000bdc2f" officeooo:paragraph-rsid="0010be21"/>
    </style:style>
    <style:style style:name="P19" style:family="paragraph" style:parent-style-name="Standard">
      <style:text-properties officeooo:rsid="000bdc2f" officeooo:paragraph-rsid="000bdc2f"/>
    </style:style>
    <style:style style:name="P20" style:family="paragraph" style:parent-style-name="Standard">
      <style:text-properties officeooo:rsid="000c3f89" officeooo:paragraph-rsid="000c3f89"/>
    </style:style>
    <style:style style:name="P21" style:family="paragraph" style:parent-style-name="Standard">
      <style:text-properties officeooo:rsid="00125944" officeooo:paragraph-rsid="00125944"/>
    </style:style>
    <style:style style:name="P22" style:family="paragraph" style:parent-style-name="Standard">
      <style:text-properties fo:font-weight="normal" officeooo:rsid="00125944" officeooo:paragraph-rsid="00125944" style:font-weight-asian="normal" style:font-weight-complex="normal"/>
    </style:style>
    <style:style style:name="P23" style:family="paragraph" style:parent-style-name="Standard">
      <style:text-properties fo:font-weight="normal" officeooo:rsid="00130021" officeooo:paragraph-rsid="00130021" style:font-weight-asian="normal" style:font-weight-complex="normal"/>
    </style:style>
    <style:style style:name="P24" style:family="paragraph" style:parent-style-name="Table_20_Contents">
      <style:text-properties officeooo:rsid="0010be21" officeooo:paragraph-rsid="0010be21"/>
    </style:style>
    <style:style style:name="P25" style:family="paragraph" style:parent-style-name="Table_20_Contents">
      <style:text-properties officeooo:rsid="0010be21" officeooo:paragraph-rsid="00125944"/>
    </style:style>
    <style:style style:name="P26" style:family="paragraph" style:parent-style-name="Table_20_Contents">
      <style:text-properties fo:font-weight="bold" officeooo:rsid="0010be21" officeooo:paragraph-rsid="0010be21" style:font-weight-asian="bold" style:font-weight-complex="bold"/>
    </style:style>
    <style:style style:name="P27" style:family="paragraph" style:parent-style-name="Table_20_Contents">
      <style:text-properties officeooo:paragraph-rsid="0010be21"/>
    </style:style>
    <style:style style:name="P28" style:family="paragraph" style:parent-style-name="Table_20_Contents">
      <style:text-properties officeooo:rsid="00125944" officeooo:paragraph-rsid="00125944"/>
    </style:style>
    <style:style style:name="P29" style:family="paragraph" style:parent-style-name="Table_20_Contents">
      <style:text-properties officeooo:paragraph-rsid="00125944"/>
    </style:style>
    <style:style style:name="P30" style:family="paragraph" style:parent-style-name="Table_20_Contents">
      <style:text-properties fo:font-style="italic" officeooo:rsid="00128c5b" officeooo:paragraph-rsid="00128c5b" style:font-style-asian="italic" style:font-style-complex="italic"/>
    </style:style>
    <style:style style:name="P31" style:family="paragraph" style:parent-style-name="Table_20_Contents">
      <style:text-properties officeooo:rsid="00130021" officeooo:paragraph-rsid="00130021"/>
    </style:style>
    <style:style style:name="T1" style:family="text">
      <style:text-properties officeooo:rsid="000aef5e"/>
    </style:style>
    <style:style style:name="T2" style:family="text">
      <style:text-properties officeooo:rsid="000bdc2f"/>
    </style:style>
    <style:style style:name="T3" style:family="text">
      <style:text-properties officeooo:rsid="000c3f89"/>
    </style:style>
    <style:style style:name="T4" style:family="text">
      <style:text-properties officeooo:rsid="000e138b"/>
    </style:style>
    <style:style style:name="T5" style:family="text">
      <style:text-properties officeooo:rsid="0010be2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5944" style:font-weight-asian="bold" style:font-weight-complex="bold"/>
    </style:style>
    <style:style style:name="T8" style:family="text">
      <style:text-properties fo:font-weight="bold" officeooo:rsid="00128c5b" style:font-weight-asian="bold" style:font-weight-complex="bold"/>
    </style:style>
    <style:style style:name="T9" style:family="text">
      <style:text-properties fo:font-weight="bold" officeooo:rsid="00130021" style:font-weight-asian="bold" style:font-weight-complex="bold"/>
    </style:style>
    <style:style style:name="T10" style:family="text">
      <style:text-properties officeooo:rsid="0012594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25944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officeooo:rsid="00125944" style:font-weight-asian="bold" style:font-weight-complex="bold"/>
    </style:style>
    <style:style style:name="T14" style:family="text">
      <style:text-properties officeooo:rsid="00128c5b"/>
    </style:style>
    <style:style style:name="T15" style:family="text">
      <style:text-properties fo:font-style="italic" officeooo:rsid="00128c5b" style:font-style-asian="italic" style:font-style-complex="italic"/>
    </style:style>
    <style:style style:name="T16" style:family="text">
      <style:text-properties fo:font-style="italic" officeooo:rsid="00130021" style:font-style-asian="italic" style:font-style-complex="italic"/>
    </style:style>
    <style:style style:name="T17" style:family="text">
      <style:text-properties officeooo:rsid="001300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VIX Straddle 26.5, 7-Mar trade, <text:s/>Feb 20th – Mar 4th</text:p>
      <text:p text:style-name="P9"/>
      <text:p text:style-name="P10">DELTA RISK MANAGEMENT</text:p>
      <text:p text:style-name="P18">On <text:span text:style-name="T5">F</text:span>eb 2<text:span text:style-name="T5">4</text:span>th, straddle was <text:span text:style-name="T5">already </text:span>above 30, so straddle adjustment (let the call aside and buy back the 26.5 put and sell the put at 30) should have been made  - <text:span text:style-name="T5">alleviating some pain for the future.</text:span> <text:span text:style-name="T3">I did not do anything… <text:s text:c="15"/></text:span><text:span text:style-name="T13">2 hours chart taken on March 6th – 12:01pm</text:span></text:p>
      <text:p text:style-name="P9"><draw:frame draw:style-name="fr1" draw:name="Image5" text:anchor-type="char" svg:width="12.882cm" svg:height="9.897cm" draw:z-index="8"><draw:image xlink:href="Pictures/1000000100000290000001F875EA42470F52274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 sold the straddle at the very top of UVIX (worst possible time) – but I was relieved and did not want any exposure to UVIX any more.</text:p>
      <text:p text:style-name="P9"><draw:frame draw:style-name="fr2" draw:name="Image6" text:anchor-type="char" svg:x="0.019cm" svg:y="0.108cm" svg:width="17cm" svg:height="8.678cm" draw:z-index="4"><draw:image xlink:href="Pictures/1000000100000472000002455A2851459F38E467.png" xlink:type="simple" xlink:show="embed" xlink:actuate="onLoad" draw:mime-type="image/png"/></draw:frame></text:p>
      <text:p text:style-name="P17"/>
      <text:p text:style-name="P16"/>
      <text:p text:style-name="P16"/>
      <text:p text:style-name="P16"/>
      <text:p text:style-name="P16"><text:soft-page-break/>Stratégie d’ajustement des straddl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6">UVIX</text:p>
          </table:table-cell>
          <table:table-cell table:style-name="Tableau1.A1" office:value-type="string">
            <text:p text:style-name="P26">IV</text:p>
          </table:table-cell>
          <table:table-cell table:style-name="Tableau1.A1" office:value-type="string">
            <text:p text:style-name="P26">Call</text:p>
          </table:table-cell>
          <table:table-cell table:style-name="Tableau1.A1" office:value-type="string">
            <text:p text:style-name="P26">Put</text:p>
          </table:table-cell>
          <table:table-cell table:style-name="Tableau1.F1" office:value-type="string">
            <text:p text:style-name="P26">Realized Gain/Loss</text:p>
          </table:table-cell>
        </table:table-row>
        <table:table-row>
          <table:table-cell table:style-name="Tableau1.A2" office:value-type="string">
            <text:p text:style-name="P24">20.02.2024</text:p>
          </table:table-cell>
          <table:table-cell table:style-name="Tableau1.A2" office:value-type="string">
            <text:p text:style-name="P24">26.4</text:p>
          </table:table-cell>
          <table:table-cell table:style-name="Tableau1.A2" office:value-type="string">
            <text:p text:style-name="P24">100 %</text:p>
          </table:table-cell>
          <table:table-cell table:style-name="Tableau1.A2" office:value-type="string">
            <text:p text:style-name="P27"><text:span text:style-name="T5">Call 26.5 : </text:span>2.<text:span text:style-name="T5">15</text:span></text:p>
          </table:table-cell>
          <table:table-cell table:style-name="Tableau1.A2" office:value-type="string">
            <text:p text:style-name="P24">Put 26.5 : 2.0<text:span text:style-name="T17">5</text:span></text:p>
          </table:table-cell>
          <table:table-cell table:style-name="Tableau1.F2" office:value-type="string">
            <text:p text:style-name="P24">NA</text:p>
          </table:table-cell>
        </table:table-row>
        <table:table-row>
          <table:table-cell table:style-name="Tableau1.A2" office:value-type="string">
            <text:p text:style-name="P24">24.02.2024 (Monday)</text:p>
          </table:table-cell>
          <table:table-cell table:style-name="Tableau1.A2" office:value-type="string">
            <text:p text:style-name="P24">30</text:p>
          </table:table-cell>
          <table:table-cell table:style-name="Tableau1.A2" office:value-type="string">
            <text:p text:style-name="P27">1<text:span text:style-name="T5">25 %</text:span></text:p>
          </table:table-cell>
          <table:table-cell table:style-name="Tableau1.A2" office:value-type="string">
            <text:p text:style-name="P27"><text:span text:style-name="T5">Call 26.5 : 4.68</text:span></text:p>
          </table:table-cell>
          <table:table-cell table:style-name="Tableau1.A2" office:value-type="string">
            <text:p text:style-name="P24">Put 26.5 : 1.15</text:p>
            <text:p text:style-name="P24">Put 30 : 2.67</text:p>
          </table:table-cell>
          <table:table-cell table:style-name="Tableau1.F2" office:value-type="string">
            <text:p text:style-name="P27"><text:span text:style-name="T17">0</text:span>.<text:span text:style-name="T5">90 → +180$</text:span></text:p>
          </table:table-cell>
        </table:table-row>
        <table:table-row>
          <table:table-cell table:style-name="Tableau1.A2" office:value-type="string">
            <text:p text:style-name="P25">03.03.2024 (Monday <text:span text:style-name="T10">18h00</text:span>)</text:p>
          </table:table-cell>
          <table:table-cell table:style-name="Tableau1.A2" office:value-type="string">
            <text:p text:style-name="P31">31.80</text:p>
          </table:table-cell>
          <table:table-cell table:style-name="Tableau1.A2" office:value-type="string">
            <text:p text:style-name="P28">1<text:span text:style-name="T17">02</text:span> %</text:p>
          </table:table-cell>
          <table:table-cell table:style-name="Tableau1.A2" office:value-type="string">
            <text:p text:style-name="P29">Call 26.5 : 5.<text:span text:style-name="T17">35</text:span></text:p>
          </table:table-cell>
          <table:table-cell table:style-name="Tableau1.A2" office:value-type="string">
            <text:p text:style-name="P28">Put 30 : 0.76<text:line-break/><text:span text:style-name="T15">Put 26.5 : 0.</text:span><text:span text:style-name="T16">06</text:span></text:p>
          </table:table-cell>
          <table:table-cell table:style-name="Tableau1.F2" office:value-type="string">
            <text:p text:style-name="P25">1.90 → +380$</text:p>
          </table:table-cell>
        </table:table-row>
        <table:table-row>
          <table:table-cell table:style-name="Tableau1.A2" office:value-type="string">
            <text:p text:style-name="P24">03.03.2024 (Monday <text:span text:style-name="T10">2</text:span><text:span text:style-name="T14">1</text:span><text:span text:style-name="T10">h00</text:span>)</text:p>
          </table:table-cell>
          <table:table-cell table:style-name="Tableau1.A2" office:value-type="string">
            <text:p text:style-name="P24">34</text:p>
          </table:table-cell>
          <table:table-cell table:style-name="Tableau1.A2" office:value-type="string">
            <text:p text:style-name="P27">1<text:span text:style-name="T5">50 %</text:span></text:p>
          </table:table-cell>
          <table:table-cell table:style-name="Tableau1.A2" office:value-type="string">
            <text:p text:style-name="P24">Call 26.5 : 7.59</text:p>
          </table:table-cell>
          <table:table-cell table:style-name="Tableau1.A2" office:value-type="string">
            <text:p text:style-name="P30">Put 26.5 : 0.17</text:p>
            <text:p text:style-name="P24">Put 30 : 0.76</text:p>
            <text:p text:style-name="P24">Put 34 : 2.34</text:p>
          </table:table-cell>
          <table:table-cell table:style-name="Tableau1.F2" office:value-type="string">
            <text:p text:style-name="P24">1.90 → +380$</text:p>
          </table:table-cell>
        </table:table-row>
        <table:table-row>
          <table:table-cell table:style-name="Tableau1.A2" office:value-type="string">
            <text:p text:style-name="P24">04.03.2024</text:p>
          </table:table-cell>
          <table:table-cell table:style-name="Tableau1.A2" office:value-type="string">
            <text:p text:style-name="P24">42</text:p>
          </table:table-cell>
          <table:table-cell table:style-name="Tableau1.A2" office:value-type="string">
            <text:p text:style-name="P24">200 %</text:p>
          </table:table-cell>
          <table:table-cell table:style-name="Tableau1.A2" office:value-type="string">
            <text:p text:style-name="P24">Call 26.5 : 15.75</text:p>
          </table:table-cell>
          <table:table-cell table:style-name="Tableau1.A2" office:value-type="string">
            <text:p text:style-name="P24">Put 34 : 0.61</text:p>
          </table:table-cell>
          <table:table-cell table:style-name="Tableau1.F2" office:value-type="string">
            <text:p text:style-name="P24">Put : 1.70 → +340$</text:p>
            <text:p text:style-name="P24">Call : -13.6 → <text:line-break/>-2720$</text:p>
          </table:table-cell>
        </table:table-row>
      </table:table>
      <text:p text:style-name="P15"/>
      <text:p text:style-name="P15">Free interest rate = 4.5 %<text:line-break/><text:span text:style-name="T6">Trade result : -2720+340+380+180 = -18</text:span><text:span text:style-name="T7">2</text:span><text:span text:style-name="T6">0$ au lieu de -2327$</text:span><text:span text:style-name="T11"> - perte toujours élevée </text:span><text:span text:style-name="T12">(20 % de perte évitée seulement)</text:span></text:p>
      <text:p text:style-name="P15"><text:span text:style-name="T12"/></text:p>
      <text:p text:style-name="P21">Si stop au 2ème ajustement (March 3rd) perte de 520$ au lieu de 1090$ (50 % de perte évitée)</text:p>
      <text:p text:style-name="P18"/>
      <text:p text:style-name="P22">Si stop March 3rd 18h : <text:span text:style-name="T17">Loss = 243$, loss=80$ with one adjustment to Put 30.</text:span></text:p>
      <text:p text:style-name="P23"/>
      <text:p text:style-name="P23">CONCLUSION : <text:span text:style-name="T17">N</text:span>e faire qu’un seul ajustement et sortir sinon<text:line-break/>Sizing minimal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Looking at BS simulation :</text:p>
      <text:p text:style-name="P9"/>
      <text:p text:style-name="P13">On March 3rd :</text:p>
      <text:p text:style-name="P13"/>
      <text:p text:style-name="P13"><draw:frame draw:style-name="fr3" draw:name="Image9" text:anchor-type="char" svg:width="17cm" svg:height="7.221cm" draw:z-index="7"><draw:image xlink:href="Pictures/10000001000004C100000205D0A179622B6447FF.png" xlink:type="simple" xlink:show="embed" xlink:actuate="onLoad" draw:mime-type="image/png"/></draw:frame><text:soft-page-break/></text:p>
      <text:p text:style-name="P13"/>
      <text:p text:style-name="P13"/>
      <text:p text:style-name="P13">O<text:span text:style-name="T4">n <text:s/>March 4th :</text:span></text:p>
      <text:p text:style-name="P13"/>
      <text:p text:style-name="P9"><draw:frame draw:style-name="fr3" draw:name="Image7" text:anchor-type="char" svg:width="17cm" svg:height="7.22cm" draw:z-index="5"><draw:image xlink:href="Pictures/10000001000004C600000207B27B4F2307332B5B.png" xlink:type="simple" xlink:show="embed" xlink:actuate="onLoad" draw:mime-type="image/png"/></draw:frame></text:p>
      <text:p text:style-name="P9"/>
      <text:p text:style-name="P9"><draw:frame draw:style-name="fr3" draw:name="Image8" text:anchor-type="char" svg:width="17cm" svg:height="11.015cm" draw:z-index="6"><draw:image xlink:href="Pictures/10000001000004AF00000309280A4878F45BC289.png" xlink:type="simple" xlink:show="embed" xlink:actuate="onLoad" draw:mime-type="image/png"/></draw:frame><text:soft-page-break/></text:p>
      <text:p text:style-name="P9"/>
      <text:p text:style-name="P6">The real point is the gap in VIX (so UVIX change from 26 till 42 – this was a delta 1 <text:span text:style-name="T2">trade (-200)</text:span>) : At this point the loss is 2300 $ - exactly what I got.</text:p>
      <text:p text:style-name="P9"/>
      <text:p text:style-name="P9"/>
      <text:p text:style-name="P10">VEGA RISK MANAGEMENT</text:p>
      <text:p text:style-name="P9"/>
      <text:p text:style-name="P12">None at this point – only one day left (vega was very small -0.0x...)</text:p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/></text:p>
      <text:p text:style-name="P3">2 weeks ago 26.5 Straddle was trading at about 100 % vol.</text:p>
      <text:p text:style-name="P3">1 week ago 110 % - <text:span text:style-name="T1">not such a big difference. </text:span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draw:style-name="fr2" draw:name="Image1" text:anchor-type="char" svg:x="-0.358cm" svg:y="-1.365cm" svg:width="17cm" svg:height="17.552cm" draw:z-index="0"><draw:image xlink:href="Pictures/10000001000003F800000419B096492F0F4022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4"><text:soft-page-break/>UVIX IV – March 7th expiration strikes IV – Feb 20th, 27th and March 4th </text:p>
      <text:p text:style-name="P1"/>
      <text:p text:style-name="P4"/>
      <text:p text:style-name="P5"/>
      <text:p text:style-name="P5"><draw:frame draw:style-name="fr2" draw:name="Image2" text:anchor-type="char" svg:x="-0.169cm" svg:y="0cm" svg:width="17cm" svg:height="9.327cm" draw:z-index="1"><draw:image xlink:href="Pictures/10000001000004A60000028D2A83FF5D0BF8E34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It is interesting to see how UVIX <text:span text:style-name="T3">IV </text:span>move<text:span text:style-name="T3">d</text:span> between Feb 28th (Friday) and Mar 3rd (Monday) :</text:p>
      <text:p text:style-name="P5"/>
      <text:p text:style-name="P5"><draw:frame draw:style-name="fr3" draw:name="Image4" text:anchor-type="char" svg:width="17cm" svg:height="8.248cm" draw:z-index="3"><draw:image xlink:href="Pictures/100000010000030900000179BFF1BC1BD9BBF75C.png" xlink:type="simple" xlink:show="embed" xlink:actuate="onLoad" draw:mime-type="image/png"/></draw:frame></text:p>
      <text:p text:style-name="P5"/>
      <text:p text:style-name="P5"/>
      <text:p text:style-name="P5"><draw:frame draw:style-name="fr2" draw:name="Image3" text:anchor-type="char" svg:x="-0.303cm" svg:y="0.409cm" svg:width="17cm" svg:height="7.239cm" draw:z-index="2"><draw:image xlink:href="Pictures/10000001000003BB0000015C08CAED41CEE5F72C.png" xlink:type="simple" xlink:show="embed" xlink:actuate="onLoad" draw:mime-type="image/png"/></draw:frame></text:p>
      <text:p text:style-name="P5"/>
      <text:p text:style-name="P5"/>
      <text:p text:style-name="P5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19:25:01.435000000</meta:creation-date>
    <dc:date>2025-03-06T12:41:48.650000000</dc:date>
    <meta:editing-duration>PT7H47M27S</meta:editing-duration>
    <meta:editing-cycles>11</meta:editing-cycles>
    <meta:generator>LibreOffice/7.5.7.1$Windows_X86_64 LibreOffice_project/47eb0cf7efbacdee9b19ae25d6752381ede23126</meta:generator>
    <meta:document-statistic meta:table-count="1" meta:image-count="9" meta:object-count="0" meta:page-count="7" meta:paragraph-count="59" meta:word-count="393" meta:character-count="1921" meta:non-whitespace-character-count="1557"/>
  </office:meta>
</office:document-meta>
</file>
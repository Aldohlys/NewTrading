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A000000706975D5661EA59617.png" manifest:media-type="image/png"/>
  <manifest:file-entry manifest:full-path="Pictures/10000001000004B60000021DBE6D17DFC5EDABD1.png" manifest:media-type="image/png"/>
  <manifest:file-entry manifest:full-path="Pictures/10000001000000F30000001A0891393A1EB5EB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577" officeooo:paragraph-rsid="00157577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57577" officeooo:paragraph-rsid="00157577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APL Diagonal Spread 1.04.2025</text:p>
      <text:p text:style-name="P1"/>
      <text:p text:style-name="P1">Trade idea is that volatility should converge</text:p>
      <text:p text:style-name="P1">May should join Apr – and therefore May vol should go down between 230 and 240 or Apr should go up in the same range:</text:p>
      <text:p text:style-name="P1"/>
      <text:p text:style-name="P1"/>
      <text:p text:style-name="P1"/>
      <text:p text:style-name="P1"><draw:frame draw:style-name="fr2" draw:name="Image1" text:anchor-type="paragraph" svg:width="7.885cm" svg:height="2.963cm" draw:z-index="0"><draw:image xlink:href="Pictures/100000010000012A000000706975D5661EA59617.png" xlink:type="simple" xlink:show="embed" xlink:actuate="onLoad" draw:mime-type="image/png"/></draw:frame><text:tab/><text:tab/><text:tab/><text:tab/><text:tab/>Multi-expiry skew AAPL, April 1st</text:p>
      <text:p text:style-name="P1"/>
      <text:p text:style-name="P1">This means selling May 240 vol and buying April 232.5 vol :</text:p>
      <text:p text:style-name="P1"><draw:frame draw:style-name="fr2" draw:name="Image2" text:anchor-type="paragraph" svg:width="6.429cm" svg:height="0.688cm" draw:z-index="1"><draw:image xlink:href="Pictures/10000001000000F30000001A0891393A1EB5EB08.png" xlink:type="simple" xlink:show="embed" xlink:actuate="onLoad" draw:mime-type="image/png"/></draw:frame>For 2.40$ credit.</text:p>
      <text:p text:style-name="P1"/>
      <text:p text:style-name="P1">The PnL is (assuming a 5 point vol increase) :</text:p>
      <text:p text:style-name="P1"><draw:frame draw:style-name="fr1" draw:name="Image3" text:anchor-type="char" svg:width="17cm" svg:height="7.625cm" draw:z-index="2"><draw:image xlink:href="Pictures/10000001000004B60000021DBE6D17DFC5EDABD1.png" xlink:type="simple" xlink:show="embed" xlink:actuate="onLoad" draw:mime-type="image/png"/></draw:frame><text:line-break/></text:p>
      <text:p text:style-name="P1"><text:span text:style-name="T1">Strategy </text:span>: Exit on Apr 15th in any cas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21:54:55.598000000</meta:creation-date>
    <dc:date>2025-04-01T22:15:17.164000000</dc:date>
    <meta:editing-duration>PT20M23S</meta:editing-duration>
    <meta:editing-cycles>1</meta:editing-cycles>
    <meta:document-statistic meta:table-count="0" meta:image-count="3" meta:object-count="0" meta:page-count="1" meta:paragraph-count="9" meta:word-count="74" meta:character-count="392" meta:non-whitespace-character-count="319"/>
    <meta:generator>LibreOffice/7.5.7.1$Windows_X86_64 LibreOffice_project/47eb0cf7efbacdee9b19ae25d6752381ede23126</meta:generator>
  </office:meta>
</office:document-meta>
</file>
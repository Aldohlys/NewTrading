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1000001D2597988A08784FEB4.png" manifest:media-type="image/png"/>
  <manifest:file-entry manifest:full-path="Pictures/100000010000013E0000024A21A3BA9ED5D99EC5.png" manifest:media-type="image/png"/>
  <manifest:file-entry manifest:full-path="Pictures/10000001000004C1000003C09BC41E960E545E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b7b" officeooo:paragraph-rsid="00040b7b"/>
    </style:style>
    <style:style style:name="P2" style:family="paragraph" style:parent-style-name="Standard">
      <style:text-properties fo:font-weight="bold" officeooo:rsid="00040b7b" officeooo:paragraph-rsid="00040b7b" style:font-weight-asian="bold" style:font-weight-complex="bold"/>
    </style:style>
    <style:style style:name="T1" style:family="text">
      <style:text-properties officeooo:rsid="0005fa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LF – 17.10.2023<text:line-break/>33.69$</text:p>
      <text:p text:style-name="P1"/>
      <text:p text:style-name="P1">Asymmetry – XLF going higher at resistance level. If it broke this resistance level, I have to get out</text:p>
      <text:p text:style-name="P1">But it should go down – <text:span text:style-name="T1">objective is 32$</text:span></text:p>
      <text:p text:style-name="P1"/>
      <text:p text:style-name="P1">Looking at short expiration</text:p>
      <text:p text:style-name="P1"><draw:frame draw:style-name="fr2" draw:name="Image2" text:anchor-type="char" svg:x="-0.161cm" svg:y="0.471cm" svg:width="6.863cm" svg:height="12.651cm" draw:z-index="1"><draw:image xlink:href="Pictures/100000010000013E0000024A21A3BA9ED5D99E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-0.238cm" svg:y="0.104cm" svg:width="17cm" svg:height="6.509cm" draw:z-index="0"><draw:image xlink:href="Pictures/10000001000004C1000001D2597988A08784FEB4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7cm" svg:height="13.409cm" draw:z-index="2"><draw:image xlink:href="Pictures/10000001000004C1000003C09BC41E960E545E7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9:44:39.847000000</meta:creation-date>
    <dc:date>2023-10-17T22:03:03.989000000</dc:date>
    <meta:editing-duration>PT2H18M24S</meta:editing-duration>
    <meta:editing-cycles>2</meta:editing-cycles>
    <meta:generator>LibreOffice/7.5.7.1$Windows_X86_64 LibreOffice_project/47eb0cf7efbacdee9b19ae25d6752381ede23126</meta:generator>
    <meta:document-statistic meta:table-count="0" meta:image-count="3" meta:object-count="0" meta:page-count="2" meta:paragraph-count="4" meta:word-count="33" meta:character-count="192" meta:non-whitespace-character-count="160"/>
  </office:meta>
</office:document-meta>
</file>
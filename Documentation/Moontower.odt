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A00000097077400EAE2CDCBF0.png" manifest:media-type="image/png"/>
  <manifest:file-entry manifest:full-path="Pictures/100000010000036A000001D34C0DD87FC933D88E.png" manifest:media-type="image/png"/>
  <manifest:file-entry manifest:full-path="Pictures/10000001000001130000005B8E7D0832367F57B8.png" manifest:media-type="image/png"/>
  <manifest:file-entry manifest:full-path="Pictures/10000001000002830000006E5ADEF3D272D8649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ef7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moontowermeta.com/" text:style-name="Internet_20_link" text:visited-style-name="Visited_20_Internet_20_Link">https://moontowermeta.com/</text:a></text:p>
      <text:p text:style-name="Standard"/>
      <text:p text:style-name="Standard"><text:a xlink:type="simple" xlink:href="https://www.reddit.com/r/options/comments/14kdsrr/using_log_returns_and_volatility_to_normalize/" text:style-name="Internet_20_link" text:visited-style-name="Visited_20_Internet_20_Link">(12) Using Log Returns And Volatility To Normalize Strike Distances : options (reddit.com)</text:a></text:p>
      <text:p text:style-name="Standard"/>
      <text:p text:style-name="Standard"><draw:frame draw:style-name="fr1" draw:name="Image3" text:anchor-type="char" svg:x="0.536cm" svg:y="0cm" svg:width="8.31cm" svg:height="3.995cm" draw:z-index="2"><draw:image xlink:href="Pictures/100000010000013A00000097077400EAE2CDCBF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205cm" svg:y="0.028cm" svg:width="7.278cm" svg:height="2.408cm" draw:z-index="3"><draw:image xlink:href="Pictures/10000001000001130000005B8E7D0832367F57B8.png" xlink:type="simple" xlink:show="embed" xlink:actuate="onLoad" draw:mime-type="image/png"/></draw:frame></text:p>
      <text:p text:style-name="Standard"/>
      <text:p text:style-name="Standard"/>
      <text:p text:style-name="Standard"><text:s/><text:span text:style-name="T1">avec Zscore=1</text:span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17cm" svg:height="2.907cm" draw:z-index="1"><draw:image xlink:href="Pictures/10000001000002830000006E5ADEF3D272D86491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Image1" text:anchor-type="char" svg:width="17cm" svg:height="9.084cm" draw:z-index="0"><draw:image xlink:href="Pictures/100000010000036A000001D34C0DD87FC933D8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1:50:45.104000000</meta:creation-date>
    <dc:date>2023-11-08T22:29:15.288000000</dc:date>
    <meta:editing-duration>PT38M29S</meta:editing-duration>
    <meta:editing-cycles>3</meta:editing-cycles>
    <meta:generator>LibreOffice/7.5.7.1$Windows_X86_64 LibreOffice_project/47eb0cf7efbacdee9b19ae25d6752381ede23126</meta:generator>
    <meta:document-statistic meta:table-count="0" meta:image-count="4" meta:object-count="0" meta:page-count="1" meta:paragraph-count="3" meta:word-count="16" meta:character-count="130" meta:non-whitespace-character-count="116"/>
  </office:meta>
</office:document-meta>
</file>
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a summary of the key points from the video "Building An Option Portfolio (without overthinking)" in bullet points:</text:p>
      <text:list text:style-name="L1">
        <text:list-item>
          <text:p text:style-name="P1"><text:span text:style-name="Strong_20_Emphasis">Portfolio Goals</text:span> (00:00–02:31):</text:p>
          <text:list>
            <text:list-item>
              <text:p text:style-name="P2">Establish your portfolio goals before making trades.</text:p>
            </text:list-item>
            <text:list-item>
              <text:p text:style-name="P2">Key goals include determining your <text:span text:style-name="Strong_20_Emphasis">portfolio Delta</text:span> (directional bias) and <text:span text:style-name="Strong_20_Emphasis">portfolio Theta</text:span> (time decay).</text:p>
            </text:list-item>
            <text:list-item>
              <text:p text:style-name="P2">Use these goals as guidelines to stay objective in decision-making, helping manage trades and portfolio exposure.</text:p>
            </text:list-item>
          </text:list>
        </text:list-item>
        <text:list-item>
          <text:p text:style-name="P1"><text:span text:style-name="Strong_20_Emphasis">Theta and Delta Goals</text:span> (02:31–06:23):</text:p>
          <text:list>
            <text:list-item>
              <text:p text:style-name="P2">Target a percentage of your net liquidating value (Net Lick) for daily Theta (time decay).</text:p>
            </text:list-item>
            <text:list-item>
              <text:p text:style-name="P2">A conservative approach targets 0.1% of Net Lick in daily Theta, while more aggressive targets range up to 0.5%.</text:p>
            </text:list-item>
            <text:list-item>
              <text:p text:style-name="P2">Theta will impact returns over the year, with a typical estimate of about 9% annual return from 0.1% daily Theta capture.</text:p>
            </text:list-item>
          </text:list>
        </text:list-item>
        <text:list-item>
          <text:p text:style-name="P1"><text:span text:style-name="Strong_20_Emphasis">Delta Directional Bias</text:span> (06:23–09:55):</text:p>
          <text:list>
            <text:list-item>
              <text:p text:style-name="P2">Decide your directional bias: bullish, bearish, or neutral.</text:p>
            </text:list-item>
            <text:list-item>
              <text:p text:style-name="P2">For bullishness, align portfolio with the SPY index (e.g., having 100 beta-weighted Deltas is equivalent to 100 shares of SPY).</text:p>
            </text:list-item>
            <text:list-item>
              <text:p text:style-name="P2">For bearish portfolios, focus on Delta-to-Theta ratio (aim for 1:2 ratio).</text:p>
            </text:list-item>
          </text:list>
        </text:list-item>
        <text:list-item>
          <text:p text:style-name="P1"><text:span text:style-name="Strong_20_Emphasis">Neutral Bias and Delta Management</text:span> (09:55–11:55):</text:p>
          <text:list>
            <text:list-item>
              <text:p text:style-name="P2">A neutral portfolio keeps Delta close to zero, adjusting trades as needed to maintain this balance.</text:p>
            </text:list-item>
            <text:list-item>
              <text:p text:style-name="P2">Focus on minimizing directional risk while adjusting positions when necessary.</text:p>
            </text:list-item>
          </text:list>
        </text:list-item>
        <text:list-item>
          <text:p text:style-name="P1"><text:span text:style-name="Strong_20_Emphasis">Understanding Vega</text:span> (13:05–14:09):</text:p>
          <text:list>
            <text:list-item>
              <text:p text:style-name="P2">Vega is not a major focus for option portfolio management, as it's less useful in forecasting returns compared to Theta and Delta.</text:p>
            </text:list-item>
          </text:list>
        </text:list-item>
        <text:list-item>
          <text:p text:style-name="P1"><text:span text:style-name="Strong_20_Emphasis">Using Indexes First</text:span> (15:25–19:53):</text:p>
          <text:list>
            <text:list-item>
              <text:p text:style-name="P2">Start portfolio building with broad indexes like S&amp;P 500, NASDAQ to minimize individual stock risks.</text:p>
            </text:list-item>
            <text:list-item>
              <text:p text:style-name="P2">Indexes represent systematic risk, offering a smoother ride compared to individual stocks, which expose traders to unsystematic risks.</text:p>
            </text:list-item>
          </text:list>
        </text:list-item>
        <text:list-item>
          <text:p text:style-name="P1"><text:span text:style-name="Strong_20_Emphasis">Incorporating Individual Stocks</text:span> (21:02–26:44):</text:p>
          <text:list>
            <text:list-item>
              <text:p text:style-name="P2">Individual stocks are added to meet Theta and Delta goals, particularly for exposure to implied volatility.</text:p>
            </text:list-item>
            <text:list-item>
              <text:p text:style-name="P2">Volatility Mean Reversion: High IVR stocks may present opportunities, especially during earnings announcements.</text:p>
            </text:list-item>
            <text:list-item>
              <text:p text:style-name="P2">Use volatility rankings (IVR) to gauge potential.</text:p>
            </text:list-item>
          </text:list>
        </text:list-item>
        <text:list-item>
          <text:p text:style-name="P1"><text:span text:style-name="Strong_20_Emphasis">Day-to-Day Portfolio Management</text:span> (28:59–31:54):</text:p>
          <text:list>
            <text:list-item>
              <text:p text:style-name="P2">Focus on identifying problems or inconsistencies in the portfolio.</text:p>
            </text:list-item>
            <text:list-item>
              <text:p text:style-name="P2">Adjust positions as needed, especially with undefined risk strategies like short puts or strangles.</text:p>
            </text:list-item>
            <text:list-item>
              <text:p text:style-name="P2"><text:soft-page-break/>Ensure portfolio targets are met by adding new positions if necessary.</text:p>
            </text:list-item>
          </text:list>
        </text:list-item>
        <text:list-item>
          <text:p text:style-name="P1"><text:span text:style-name="Strong_20_Emphasis">Adjusting Portfolio Positions</text:span> (33:04–35:15):</text:p>
          <text:list>
            <text:list-item>
              <text:p text:style-name="P2">At the position level, make necessary adjustments to align with your portfolio goals.</text:p>
            </text:list-item>
            <text:list-item>
              <text:p text:style-name="P1">For minor misalignments, it’s okay to take a few days to adjust positions without panicking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21:56:42.973000000</meta:creation-date>
    <dc:date>2024-12-04T21:56:55.515000000</dc:date>
    <meta:editing-duration>PT13S</meta:editing-duration>
    <meta:editing-cycles>1</meta:editing-cycles>
    <meta:document-statistic meta:table-count="0" meta:image-count="0" meta:object-count="0" meta:page-count="2" meta:paragraph-count="32" meta:word-count="406" meta:character-count="2586" meta:non-whitespace-character-count="2252"/>
    <meta:generator>LibreOffice/7.5.7.1$Windows_X86_64 LibreOffice_project/47eb0cf7efbacdee9b19ae25d6752381ede23126</meta:generator>
  </office:meta>
</office:document-meta>
</file>